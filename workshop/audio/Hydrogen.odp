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E000002AB1E03BB83.png" manifest:media-type="image/png"/>
  <manifest:file-entry manifest:full-path="Pictures/100000010000031200000224C5295F83.png" manifest:media-type="image/png"/>
  <manifest:file-entry manifest:full-path="Pictures/100000010000031200000224A3114AA3.png" manifest:media-type="image/png"/>
  <manifest:file-entry manifest:full-path="Pictures/100000010000018200000110E8A1D02F.png" manifest:media-type="image/png"/>
  <manifest:file-entry manifest:full-path="Pictures/1000000100000190000001401DB7F518.png" manifest:media-type="image/png"/>
  <manifest:file-entry manifest:full-path="Pictures/10000001000001F400000176A06F615F.png" manifest:media-type="image/png"/>
  <manifest:file-entry manifest:full-path="Pictures/10000001000001F400000177FE1BEC2E.png" manifest:media-type="image/png"/>
  <manifest:file-entry manifest:full-path="Pictures/10000001000001F400000177665FA426.png" manifest:media-type="image/png"/>
  <manifest:file-entry manifest:full-path="Pictures/10000001000001930000008D156AB2AB.png" manifest:media-type="image/png"/>
  <manifest:file-entry manifest:full-path="Pictures/100000000000034D0000014217DF88F4.png" manifest:media-type="image/png"/>
  <manifest:file-entry manifest:full-path="Pictures/100000010000030A000000F25E6B09C2.png" manifest:media-type="image/png"/>
  <manifest:file-entry manifest:full-path="Pictures/10000000000003FD000002D1DFD6310C.png" manifest:media-type="image/png"/>
  <manifest:file-entry manifest:full-path="Pictures/1000000100000312000002248D94296E.png" manifest:media-type="image/png"/>
  <manifest:file-entry manifest:full-path="Pictures/10000000000001280000019959EF298D.png" manifest:media-type="image/png"/>
  <manifest:file-entry manifest:full-path="Pictures/10000001000001F400000177A479DC6D.png" manifest:media-type="image/png"/>
  <manifest:file-entry manifest:full-path="Pictures/100000000000061200000242AD5006E2.png" manifest:media-type="image/png"/>
  <manifest:file-entry manifest:full-path="Pictures/10000001000002AE000002AB26255B17.png" manifest:media-type="image/png"/>
  <manifest:file-entry manifest:full-path="Pictures/1000000100000195000001509054675F.png" manifest:media-type="image/png"/>
  <manifest:file-entry manifest:full-path="Pictures/1000000000000125000001C3A784837A.png" manifest:media-type="image/png"/>
  <manifest:file-entry manifest:full-path="Pictures/10000001000003640000030AE128B5F2.png" manifest:media-type="image/png"/>
  <manifest:file-entry manifest:full-path="Pictures/100000000000012D000001C7890873CE.png" manifest:media-type="image/png"/>
  <manifest:file-entry manifest:full-path="Pictures/1000000100000096000000791A923FBB.png" manifest:media-type="image/png"/>
  <manifest:file-entry manifest:full-path="Pictures/100000010000036F0000031B8CA70EDA.png" manifest:media-type="image/png"/>
  <manifest:file-entry manifest:full-path="Pictures/10000001000002DD000001ED0934FE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solid" draw:fill-color="#cccccc" draw:auto-grow-height="true" draw:auto-grow-width="false" fo:min-height="0.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2.35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ax-height="0cm" fo:min-height="6.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4.221cm" loext:decorative="false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on_25_20Linux-title">
      <style:graphic-properties fo:min-height="3.506cm" loext:decorative="false"/>
      <style:paragraph-properties style:writing-mode="lr-tb"/>
    </style:style>
    <style:style style:name="pr3" style:family="presentation" style:parent-style-name="Son_25_20Linux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Son_25_20Linux-title">
      <style:graphic-properties draw:auto-grow-height="true"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cccccc"/>
      <style:text-properties style:font-name="Nimbus Mono PS" fo:background-color="transparent"/>
    </style:style>
    <style:style style:name="P10" style:family="paragraph">
      <loext:graphic-properties draw:fill="solid" draw:fill-color="#ddddd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10.413cm" svg:x="0.053cm" svg:y="5.734cm">
          <draw:image xlink:href="Pictures/100000000000061200000242AD5006E2.png" xlink:type="simple" xlink:show="embed" xlink:actuate="onLoad" draw:mime-type="image/png">
            <text:p/>
          </draw:image>
        </draw:frame>
        <draw:frame draw:style-name="gr3" draw:text-style-name="P2" draw:layer="layout" svg:width="9.8cm" svg:height="0.964cm" svg:x="13.9cm" svg:y="12.236cm">
          <draw:text-box>
            <text:p>https://www.hydrogen-music.org</text:p>
          </draw:text-box>
        </draw:frame>
        <draw:frame draw:style-name="gr4" draw:text-style-name="P4" draw:layer="layout" svg:width="11.2cm" svg:height="1.673cm" svg:x="9cm" svg:y="16.4cm">
          <draw:text-box>
            <text:p text:style-name="P3">Y. Collette (ycollette.nospam@free.fr)</text:p>
            <text:p text:style-name="P3">https://audinux.github.io</text:p>
          </draw:text-box>
        </draw:frame>
        <draw:frame draw:style-name="gr5" draw:text-style-name="P5" draw:layer="layout" svg:width="6.539cm" svg:height="2.927cm" svg:x="11.2cm" svg:y="1.8cm">
          <draw:text-box>
            <text:p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Facility</text:p>
            <text:p>Resources</text:p>
          </draw:text-box>
        </draw:frame>
        <draw:frame draw:style-name="gr7" draw:text-style-name="P7" draw:layer="layout" svg:width="25.2cm" svg:height="1.2cm" svg:x="1.2cm" svg:y="4.6cm">
          <draw:text-box>
            <text:p>$ dnf install hydrogen</text:p>
          </draw:text-box>
        </draw:frame>
        <draw:frame draw:style-name="gr8" draw:text-style-name="P8" draw:layer="layout" svg:width="5.6cm" svg:height="13.049cm" svg:x="1.2cm" svg:y="5.8cm">
          <draw:text-box>
            <text:p><text:span text:style-name="T2">3355606kit</text:span></text:p>
            <text:p><text:span text:style-name="T2">AVL-BlackPearl-4A-1.1</text:span></text:p>
            <text:p><text:span text:style-name="T2">AVL-BlackPearl-4B-1.1</text:span></text:p>
            <text:p><text:span text:style-name="T2">AVL-BlackPearl-5-1.1</text:span></text:p>
            <text:p><text:span text:style-name="T2">AVL-RedZep-4-1.0</text:span></text:p>
            <text:p><text:span text:style-name="T2">AVL-RedZep-5-1.1</text:span></text:p>
            <text:p><text:span text:style-name="T2">Ace-Tone_Rhythm_Ace</text:span></text:p>
            <text:p><text:span text:style-name="T2">Ace-Tone_Rhythm_Plus</text:span></text:p>
            <text:p><text:span text:style-name="T2">Akai_MPC-X</text:span></text:p>
            <text:p><text:span text:style-name="T2">Akai_XE8</text:span></text:p>
            <text:p><text:span text:style-name="T2">Akai_XR10</text:span></text:p>
            <text:p><text:span text:style-name="T2">Akai_XR10_Latiny</text:span></text:p>
            <text:p><text:span text:style-name="T2">Alesis_D4FX_full</text:span></text:p>
            <text:p><text:span text:style-name="T2">Alesis_DM5_circle_full</text:span></text:p>
            <text:p><text:span text:style-name="T2">Alesis_DM5_eclectic</text:span></text:p>
            <text:p><text:span text:style-name="T2">Alesis_DM5_future_full</text:span></text:p>
            <text:p><text:span text:style-name="T2">Alesis_DM5_ghazal_full</text:span></text:p>
            <text:p><text:span text:style-name="T2">Alesis_DM5_space_full</text:span></text:p>
            <text:p><text:span text:style-name="T2">Alesis_HR16_chaser</text:span></text:p>
            <text:p><text:span text:style-name="T2">Alesis_HR16_power_full</text:span></text:p>
            <text:p><text:span text:style-name="T2">Alesis_HR16_skins_full</text:span></text:p>
            <text:p><text:span text:style-name="T2">Alesis_HR16_wimpy</text:span></text:p>
            <text:p><text:span text:style-name="T2">Alesis_SR16</text:span></text:p>
            <text:p><text:span text:style-name="T2">Altemark_gameboy-lsdj</text:span></text:p>
            <text:p><text:span text:style-name="T2">BJAPacific</text:span></text:p>
            <text:p><text:span text:style-name="T2">Bdu_Roland_TR606</text:span></text:p>
            <text:p><text:span text:style-name="T2">Blackie666_8bit</text:span></text:p>
          </draw:text-box>
        </draw:frame>
        <draw:frame draw:style-name="gr8" draw:text-style-name="P8" draw:layer="layout" svg:width="6.4cm" svg:height="13.049cm" svg:x="7cm" svg:y="5.751cm">
          <draw:text-box>
            <text:p><text:span text:style-name="T2">Boss_DR-110</text:span></text:p>
            <text:p><text:span text:style-name="T2">Boss_DR-660_taxman_full</text:span></text:p>
            <text:p><text:span text:style-name="T2">Boss_DR-660_zapman_full</text:span></text:p>
            <text:p><text:span text:style-name="T2">Boss_DR110_full</text:span></text:p>
            <text:p><text:span text:style-name="T2">Boss_DR202_altaira_full</text:span></text:p>
            <text:p><text:span text:style-name="T2">Boss_DR202_sainthood</text:span></text:p>
            <text:p><text:span text:style-name="T2">Boss_DR202_zaphod_full</text:span></text:p>
            <text:p><text:span text:style-name="T2">Boss_DR220C</text:span></text:p>
            <text:p><text:span text:style-name="T2">Boss_DR550_cymbale</text:span></text:p>
            <text:p><text:span text:style-name="T2">Boss_DR550_dj</text:span></text:p>
            <text:p><text:span text:style-name="T2">Casio_MT500</text:span></text:p>
            <text:p><text:span text:style-name="T2">Casio_MT800</text:span></text:p>
            <text:p><text:span text:style-name="T2">Casio_PT30</text:span></text:p>
            <text:p><text:span text:style-name="T2">Casio_PT80</text:span></text:p>
            <text:p><text:span text:style-name="T2">Casio_RAP1</text:span></text:p>
            <text:p><text:span text:style-name="T2">Casio_RZ3</text:span></text:p>
            <text:p><text:span text:style-name="T2">Cheetah_MD16_full</text:span></text:p>
            <text:p><text:span text:style-name="T2">Classic-626</text:span></text:p>
            <text:p><text:span text:style-name="T2">Classic-808</text:span></text:p>
            <text:p><text:span text:style-name="T2">ColomboAcousticDrumkit</text:span></text:p>
            <text:p><text:span text:style-name="T2">DeathMetal</text:span></text:p>
            <text:p><text:span text:style-name="T2">EKO_Rhythmbox</text:span></text:p>
            <text:p><text:span text:style-name="T2">EasternHop-1</text:span></text:p>
            <text:p><text:span text:style-name="T2">ElectricEmpireKit</text:span></text:p>
            <text:p><text:span text:style-name="T2">Electro_Harmonix_Drm15-32</text:span></text:p>
            <text:p><text:span text:style-name="T2">Emu_Drumulator</text:span></text:p>
            <text:p><text:span text:style-name="T2">Emu_Drumulator-alt</text:span></text:p>
          </draw:text-box>
        </draw:frame>
        <draw:frame draw:style-name="gr8" draw:text-style-name="P8" draw:layer="layout" svg:width="6.4cm" svg:height="13.049cm" svg:x="13.4cm" svg:y="5.8cm">
          <draw:text-box>
            <text:p><text:span text:style-name="T2">EMU_E-DRUM</text:span></text:p>
            <text:p><text:span text:style-name="T2">EMU_SP1</text:span></text:p>
            <text:p><text:span text:style-name="T2">Ensoniq_Asrx_Acoustic_Full</text:span></text:p>
            <text:p><text:span text:style-name="T2">Ensoniq_Asrx_Electro_Full</text:span></text:p>
            <text:p><text:span text:style-name="T2">Ernyspercussion</text:span></text:p>
            <text:p><text:span text:style-name="T2">Fairlight_cmi-IX_Full</text:span></text:p>
            <text:p><text:span text:style-name="T2">Farfisa</text:span></text:p>
            <text:p><text:span text:style-name="T2">Fortereo</text:span></text:p>
            <text:p><text:span text:style-name="T2">Fricke_mfb5x2</text:span></text:p>
            <text:p><text:span text:style-name="T2">Hamnd_Autovari2</text:span></text:p>
            <text:p><text:span text:style-name="T2">Hamnd_DPM4</text:span></text:p>
            <text:p><text:span text:style-name="T2">Hardelectro1</text:span></text:p>
            <text:p><text:span text:style-name="T2">Hiphop-1</text:span></text:p>
            <text:p><text:span text:style-name="T2">Hiphop-2</text:span></text:p>
            <text:p><text:span text:style-name="T2">Ianhall_SamPlesseet</text:span></text:p>
            <text:p><text:span text:style-name="T2">Jovica_Tonic_Full</text:span></text:p>
            <text:p><text:span text:style-name="T2">K-27_Trash_kit</text:span></text:p>
            <text:p><text:span text:style-name="T2">Kawaixd-5kit</text:span></text:p>
            <text:p><text:span text:style-name="T2">Kawai_R1</text:span></text:p>
            <text:p><text:span text:style-name="T2">Kawai_R50_Full</text:span></text:p>
            <text:p><text:span text:style-name="T2">Kawai_xd5</text:span></text:p>
            <text:p><text:span text:style-name="T2">Corg_DDD1</text:span></text:p>
            <text:p><text:span text:style-name="T2">Corg_DDD5</text:span></text:p>
            <text:p><text:span text:style-name="T2">Corg_DDM1</text:span></text:p>
            <text:p><text:span text:style-name="T2">Corg_kpr7</text:span></text:p>
            <text:p><text:span text:style-name="T2">Corg_kr5</text:span></text:p>
            <text:p><text:span text:style-name="T2">Corg_m1</text:span></text:p>
          </draw:text-box>
        </draw:frame>
        <draw:frame draw:style-name="gr8" draw:text-style-name="P8" draw:layer="layout" svg:width="7.8cm" svg:height="13.049cm" svg:x="19.8cm" svg:y="5.8cm">
          <draw:text-box>
            <text:p><text:span text:style-name="T2">Korg_ms20+ems_vcs3</text:span></text:p>
            <text:p><text:span text:style-name="T2">Korg_minipops35</text:span></text:p>
            <text:p><text:span text:style-name="T2">Korg_minipops7</text:span></text:p>
            <text:p><text:span text:style-name="T2">Korg_sr120</text:span></text:p>
            <text:p><text:span text:style-name="T2">Korg_tx</text:span></text:p>
            <text:p><text:span text:style-name="T2">Korg_wavestation</text:span></text:p>
            <text:p><text:span text:style-name="T2">Korg_x5_full</text:span></text:p>
            <text:p><text:span text:style-name="T2">Lightning1024</text:span></text:p>
            <text:p><text:span text:style-name="T2">Linn_lm1</text:span></text:p>
            <text:p><text:span text:style-name="T2">Linn_lm2</text:span></text:p>
            <text:p><text:span text:style-name="T2">Linn_linn-9000</text:span></text:p>
            <text:p><text:span text:style-name="T2">Linn_linndrum</text:span></text:p>
            <text:p><text:span text:style-name="T2">Ltibbits_Rock</text:span></text:p>
            <text:p><text:span text:style-name="T2">Lugenfalscher_beguinesandbeghards</text:span></text:p>
            <text:p><text:span text:style-name="T2">Lugenfalscher_blitzbox</text:span></text:p>
            <text:p><text:span text:style-name="T2">Lugenfalscher_sg1</text:span></text:p>
            <text:p><text:span text:style-name="T2">Lugenfalscher_teatime</text:span></text:p>
            <text:p><text:span text:style-name="T2">Mxr_m185</text:span></text:p>
            <text:p><text:span text:style-name="T2">Matiasreccius_heavymetal</text:span></text:p>
            <text:p><text:span text:style-name="T2">Mill-Dums_v.1</text:span></text:p>
            <text:p><text:span text:style-name="T2">Millo_multilayered2</text:span></text:p>
            <text:p><text:span text:style-name="T2">Millo_multilayered3</text:span></text:p>
            <text:p><text:span text:style-name="T2">Moogish_full</text:span></text:p>
            <text:p><text:span text:style-name="T2">Oberheim_dmx</text:span></text:p>
            <text:p><text:span text:style-name="T2">Quasimidi_309</text:span></text:p>
            <text:p><text:span text:style-name="T2">Rolandjd-990kit</text:span></text:p>
            <text:p><text:span text:style-name="T2">Roland_cr-100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Facility</text:p>
            <text:p>Resources</text:p>
          </draw:text-box>
        </draw:frame>
        <draw:frame draw:style-name="gr7" draw:text-style-name="P9" draw:layer="layout" svg:width="25.2cm" svg:height="1.2cm" svg:x="1.2cm" svg:y="4.6cm">
          <draw:text-box>
            <text:p>$ dnf install hydrogen-drumkit-TD-7kit</text:p>
          </draw:text-box>
        </draw:frame>
        <draw:frame draw:style-name="gr9" draw:text-style-name="P8" draw:layer="layout" svg:width="6.4cm" svg:height="12.6cm" svg:x="1.2cm" svg:y="5.8cm">
          <draw:text-box>
            <text:p><text:span text:style-name="T2">Roland_CR79</text:span></text:p>
            <text:p><text:span text:style-name="T2">Roland_D-10_withMOD_full</text:span></text:p>
            <text:p><text:span text:style-name="T2">Roland_D-70</text:span></text:p>
            <text:p><text:span text:style-name="T2">Roland_JD-990_full</text:span></text:p>
            <text:p><text:span text:style-name="T2">Roland_JD800</text:span></text:p>
            <text:p><text:span text:style-name="T2">Roland_MC303</text:span></text:p>
            <text:p><text:span text:style-name="T2">Roland_TB909</text:span></text:p>
            <text:p><text:span text:style-name="T2">Roland_Tr-808_full</text:span></text:p>
            <text:p><text:span text:style-name="T2">SF3007-2011-Set-03</text:span></text:p>
            <text:p><text:span text:style-name="T2">Serge_Modular</text:span></text:p>
            <text:p><text:span text:style-name="T2">Suonho_deconstruction</text:span></text:p>
            <text:p><text:span text:style-name="T2">Synthie-1</text:span></text:p>
            <text:p><text:span text:style-name="T2">TD-7kit</text:span></text:p>
            <text:p><text:span text:style-name="T2">TR808909</text:span></text:p>
            <text:p><text:span text:style-name="T2">Techno-1</text:span></text:p>
            <text:p><text:span text:style-name="T2">Thanvannispen_industrisplode</text:span></text:p>
            <text:p><text:span text:style-name="T2">TicTacShutUp_studio_17-29</text:span></text:p>
            <text:p><text:span text:style-name="T2">VariBreaks</text:span></text:p>
            <text:p><text:span text:style-name="T2">YamahaRX15Kit</text:span></text:p>
            <text:p><text:span text:style-name="T2">YamahaTG-55Kit</text:span></text:p>
            <text:p><text:span text:style-name="T2">YamahaVintageKit</text:span></text:p>
            <text:p><text:span text:style-name="T2">Yamaha_SY22_full</text:span></text:p>
            <text:p><text:span text:style-name="T2">Yamaha_Sy35</text:span></text:p>
            <text:p><text:span text:style-name="T2">Yamaha_TX16W</text:span></text:p>
            <text:p><text:span text:style-name="T2">Yamaha_Tg33_full</text:span></text:p>
            <text:p><text:span text:style-name="T2">Yoursck+Vitriolix_Texturize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General appearance</text:p>
          </draw:text-box>
        </draw:frame>
        <draw:frame draw:style-name="gr2" draw:text-style-name="P1" draw:layer="layout" svg:width="15.01cm" svg:height="10.6cm" svg:x="11.6cm" svg:y="6.1cm">
          <draw:image xlink:href="Pictures/10000000000003FD000002D1DFD6310C.png" xlink:type="simple" xlink:show="embed" xlink:actuate="onLoad" draw:mime-type="image/png">
            <text:p/>
          </draw:image>
        </draw:frame>
        <draw:custom-shape draw:style-name="gr10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5.2cm" svg:height="0.962cm" svg:x="1.6cm" svg:y="6.7cm">
          <draw:text-box>
            <text:p>Menus sweep</text:p>
          </draw:text-box>
        </draw:frame>
        <draw:frame draw:style-name="gr11" draw:text-style-name="P4" draw:layer="layout" svg:width="7.6cm" svg:height="0.962cm" svg:x="1.6cm" svg:y="7.737cm">
          <draw:text-box>
            <text:p>Patterns sequencer</text:p>
          </draw:text-box>
        </draw:frame>
        <draw:frame draw:style-name="gr11" draw:text-style-name="P4" draw:layer="layout" svg:width="6cm" svg:height="0.962cm" svg:x="1.6cm" svg:y="8.7cm">
          <draw:text-box>
            <text:p>Patterns</text:p>
          </draw:text-box>
        </draw:frame>
        <draw:frame draw:style-name="gr11" draw:text-style-name="P4" draw:layer="layout" svg:width="6.2cm" svg:height="0.962cm" svg:x="1.6cm" svg:y="9.9cm">
          <draw:text-box>
            <text:p>Sound settings</text:p>
          </draw:text-box>
        </draw:frame>
        <draw:line draw:style-name="gr12" draw:text-style-name="P1" draw:layer="layout" svg:x1="6cm" svg:y1="7.2cm" svg:x2="13.2cm" svg:y2="6.9cm">
          <text:p/>
        </draw:line>
        <draw:line draw:style-name="gr12" draw:text-style-name="P1" draw:layer="layout" svg:x1="7.8cm" svg:y1="8.2cm" svg:x2="13.6cm" svg:y2="8.9cm">
          <text:p/>
        </draw:line>
        <draw:line draw:style-name="gr12" draw:text-style-name="P1" draw:layer="layout" svg:x1="6cm" svg:y1="9.2cm" svg:x2="12.8cm" svg:y2="10.9cm">
          <text:p/>
        </draw:line>
        <draw:line draw:style-name="gr12" draw:text-style-name="P1" draw:layer="layout" svg:x1="6.8cm" svg:y1="10.6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1/2 sound adjustment</text:p>
          </draw:text-box>
        </draw:frame>
        <draw:frame draw:style-name="gr2" draw:text-style-name="P1" draw:layer="layout" svg:width="9.43cm" svg:height="13.03cm" svg:x="17.17cm" svg:y="5.4cm">
          <draw:image xlink:href="Pictures/10000000000001280000019959EF298D.png" xlink:type="simple" xlink:show="embed" xlink:actuate="onLoad" draw:mime-type="image/png">
            <text:p/>
          </draw:image>
        </draw:frame>
        <draw:frame draw:style-name="gr13" draw:text-style-name="P4" draw:layer="layout" svg:width="13.4cm" svg:height="3.806cm" svg:x="1.8cm" svg:y="7.2cm">
          <draw:text-box>
            <text:p>ADSR filter associated with each drum sound</text:p>
            <text:p>Attack: Attack</text:p>
            <text:p>Decay: decrease</text:p>
            <text:p>Sustain: Maintain</text:p>
            <text:p>Release: relaxation</text:p>
          </draw:text-box>
        </draw:frame>
        <draw:custom-shape draw:style-name="gr10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4cm" svg:height="0.962cm" svg:x="7cm" svg:y="12.838cm">
          <draw:text-box>
            <text:p>Various sound effects</text:p>
          </draw:text-box>
        </draw:frame>
        <draw:line draw:style-name="gr12" draw:text-style-name="P1" draw:layer="layout" svg:x1="14.4cm" svg:y1="13.4cm" svg:x2="18.8cm" svg:y2="12.6cm">
          <text:p/>
        </draw:line>
        <draw:line draw:style-name="gr12" draw:text-style-name="P1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Sound adjustment 2/2</text:p>
          </draw:text-box>
        </draw:frame>
        <draw:frame draw:style-name="gr2" draw:text-style-name="P1" draw:layer="layout" svg:width="8.65cm" svg:height="13.32cm" svg:x="17.95cm" svg:y="5.2cm">
          <draw:image xlink:href="Pictures/1000000000000125000001C3A784837A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Each drum sound can be a superposition of different sounds.</text:p>
          </draw:text-box>
        </draw:frame>
        <draw:line draw:style-name="gr12" draw:text-style-name="P1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Library selection</text:p>
          </draw:text-box>
        </draw:frame>
        <draw:frame draw:style-name="gr2" draw:text-style-name="P1" draw:layer="layout" svg:width="7.964cm" svg:height="12.039cm" svg:x="18.8cm" svg:y="7.4cm">
          <draw:image xlink:href="Pictures/100000000000012D000001C7890873CE.png" xlink:type="simple" xlink:show="embed" xlink:actuate="onLoad" draw:mime-type="image/png">
            <text:p/>
          </draw:image>
        </draw:frame>
        <draw:frame draw:style-name="gr14" draw:text-style-name="P4" draw:layer="layout" svg:width="22.2cm" svg:height="3.095cm" svg:x="1.4cm" svg:y="5cm">
          <draw:text-box>
            <text:p>Several drum sets exist. Some are downloadable from the site:</text:p>
            <text:p/>
            <text:p>http://sourceforge.net/projects/hydrogen/files/sound%20libraries/</text:p>
          </draw:text-box>
        </draw:frame>
        <draw:frame draw:style-name="gr15" draw:text-style-name="P4" draw:layer="layout" svg:width="16.4cm" svg:height="2.384cm" svg:x="1.4cm" svg:y="8.095cm">
          <draw:text-box>
            <text:p>Version 0.9.7 allows you to download automatically and install new drum sounds.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Import of libraries</text:p>
          </draw:text-box>
        </draw:frame>
        <draw:frame draw:style-name="gr16" draw:text-style-name="P4" draw:layer="layout" svg:width="14.4cm" svg:height="10.205cm" svg:x="1.4cm" svg:y="5cm">
          <draw:text-box>
            <text:p>To install a new library, the easiest way is to go through the instrument menu:</text:p>
            <text:p/>
            <text:p>Instruments → Import Library</text:p>
            <text:p/>
            <text:p>Click on 'Update List', then select the library you want to install and then click the 'Download and install' button.</text:p>
            <text:p/>
            <text:p>Some other libraries are accessible here:</text:p>
            <text:p/>
            <text:p>http://www.hydrogen-music.org/hcms/node/16</text:p>
          </draw:text-box>
        </draw:frame>
        <draw:frame draw:style-name="gr2" draw:text-style-name="P1" draw:layer="layout" svg:width="12.22cm" svg:height="11.05cm" svg:x="15.4cm" svg:y="4.8cm">
          <draw:image xlink:href="Pictures/100000010000036F0000031B8CA70ED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Mixer</text:p>
          </draw:text-box>
        </draw:frame>
        <draw:frame draw:style-name="gr2" draw:text-style-name="P1" draw:layer="layout" svg:width="22.357cm" svg:height="8.52cm" svg:x="3.043cm" svg:y="6cm">
          <draw:image xlink:href="Pictures/100000000000034D0000014217DF88F4.png" xlink:type="simple" xlink:show="embed" xlink:actuate="onLoad" draw:mime-type="image/png">
            <text:p/>
          </draw:image>
        </draw:frame>
        <draw:custom-shape draw:style-name="gr10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3">Mixing track for each sounds of the drum</text:p>
          </draw:text-box>
        </draw:frame>
        <draw:frame draw:style-name="gr15" draw:text-style-name="P4" draw:layer="layout" svg:width="5.2cm" svg:height="2.384cm" svg:x="16.8cm" svg:y="15.2cm">
          <draw:text-box>
            <text:p text:style-name="P3">Effect zone of effects plugins</text:p>
          </draw:text-box>
        </draw:frame>
        <draw:frame draw:style-name="gr4" draw:text-style-name="P4" draw:layer="layout" svg:width="3cm" svg:height="1.673cm" svg:x="22cm" svg:y="15.2cm">
          <draw:text-box>
            <text:p text:style-name="P3">General level</text:p>
          </draw:text-box>
        </draw:frame>
        <draw:line draw:style-name="gr12" draw:text-style-name="P1" draw:layer="layout" svg:x1="9.4cm" svg:y1="15.4cm" svg:x2="9.2cm" svg:y2="13.2cm">
          <text:p/>
        </draw:line>
        <draw:line draw:style-name="gr12" draw:text-style-name="P1" draw:layer="layout" svg:x1="19.4cm" svg:y1="15.2cm" svg:x2="20.2cm" svg:y2="13.6cm">
          <text:p/>
        </draw:line>
        <draw:line draw:style-name="gr12" draw:text-style-name="P1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Midi management</text:p>
          </draw:text-box>
        </draw:frame>
        <draw:frame draw:style-name="gr13" draw:text-style-name="P4" draw:layer="layout" svg:width="25cm" svg:height="3.806cm" svg:x="1.6cm" svg:y="5.2cm">
          <draw:text-box>
            <text:p>Version 0.9.5 manages the Midi Alsa (the Hydrogen input appears in the Alsa Midi section of Qjackctl.</text:p>
            <text:p/>
            <text:p>Version 0.9.6 Beta manages the Midi Alsa and Jack (the Hydrogen input may appear to choose from in the Alsa or Jack of Qjackctl section.</text:p>
          </draw:text-box>
        </draw:frame>
        <draw:frame draw:style-name="gr17" draw:text-style-name="P10" draw:layer="layout" svg:width="25cm" svg:height="6.65cm" svg:x="1.8cm" svg:y="9.4cm">
          <draw:text-box>
            <text:p>$ git clone https://github.com/hydrogen-music/hydrogen.git</text:p>
            <text:p>$ CD Hydrogen</text:p>
            <text:p>$ mkdir build_tmp</text:p>
            <text:p>$ cd build_tmp</text:p>
            <text:p>$ cmake -dcmake_install_prefix =/opt/hydrogen -devel -dcmake_build_type = release ..</text:p>
            <text:p>$ # Install the missing applications, then relaunch the command above</text:p>
            <text:p>$ make</text:p>
            <text:p>$ sudo make install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 an instrument</text:p>
          </draw:text-box>
        </draw:frame>
        <draw:frame draw:style-name="gr18" draw:text-style-name="P4" draw:layer="layout" svg:width="25.2cm" svg:height="10.916cm" svg:x="1.4cm" svg:y="5.2cm">
          <draw:text-box>
            <text:p>Hydrogen only uses part of the MIDI events to control sounds.</text:p>
            <text:p>The events managed range from 36 to 59.</text:p>
            <text:p/>
            <text:p>To find out that they are generating MIDI events, you have to connect its outing to KMIDIMON. This application makes it possible to display all the MIDI events that go through a given connection.</text:p>
            <text:p/>
            <text:p>Then, the hydrogen instruments must be reordered according to the MIDI events of the instrument.</text:p>
            <text:p/>
            <text:p>For example, if my instrument generates an event 36 and that we want to associate a snare, then it will be necessary to move the snare in position 1 (so that it is triggered by our MIDI 36 event) in the Drumkit loaded in Hydrogen.</text:p>
            <text:p/>
            <text:p>The following table lists the instrument positions with associated MIDI events.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 an instrument</text:p>
          </draw:text-box>
        </draw:frame>
        <draw:frame draw:style-name="gr2" draw:text-style-name="P1" draw:layer="layout" svg:width="21.11cm" svg:height="14.2cm" svg:x="3.6cm" svg:y="4.8cm">
          <draw:image xlink:href="Pictures/10000001000002DD000001ED0934FE5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 presentation:user-transformed="true">
          <draw:text-box>
            <text:p>DrMr</text:p>
            <text:p>LV2 Plugin LV2 for Hydrogen</text:p>
          </draw:text-box>
        </draw:frame>
        <draw:frame draw:style-name="gr2" draw:text-style-name="P1" draw:layer="layout" svg:width="14.13cm" svg:height="14.07cm" svg:x="1.47cm" svg:y="4.93cm">
          <draw:image xlink:href="Pictures/10000001000002AE000002AB26255B17.png" xlink:type="simple" xlink:show="embed" xlink:actuate="onLoad" draw:mime-type="image/png">
            <text:p/>
          </draw:image>
        </draw:frame>
        <draw:frame draw:style-name="gr14" draw:text-style-name="P4" draw:layer="layout" svg:width="11cm" svg:height="3.095cm" svg:x="15.6cm" svg:y="4.93cm">
          <draw:text-box>
            <text:p>DRMR is a LV2 plugin that allows you to read hydrogen files and generate a sound rendering via MIDI events</text:p>
          </draw:text-box>
        </draw:frame>
        <draw:frame draw:style-name="gr19" draw:text-style-name="P2" draw:layer="layout" svg:width="9.538cm" svg:height="1cm" svg:x="16.062cm" svg:y="8.6cm">
          <draw:text-box>
            <text:p>https://github.com/nicklan/drmr</text:p>
          </draw:text-box>
        </draw:frame>
        <draw:frame draw:style-name="gr14" draw:text-style-name="P4" draw:layer="layout" svg:width="11cm" svg:height="3.095cm" svg:x="15.6cm" svg:y="9.931cm">
          <draw:text-box>
            <text:p>Other puglins are available:</text:p>
            <text:p>- Drumrox</text:p>
            <text:p>- Drumlabooh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An alternative: Drumgizmo</text:p>
          </draw:text-box>
        </draw:frame>
        <draw:frame draw:style-name="gr2" draw:text-style-name="P1" draw:layer="layout" svg:width="3.968cm" svg:height="3.2cm" svg:x="1.4cm" svg:y="5.2cm">
          <draw:image xlink:href="Pictures/1000000100000096000000791A923FBB.png" xlink:type="simple" xlink:show="embed" xlink:actuate="onLoad" draw:mime-type="image/png">
            <text:p/>
          </draw:image>
        </draw:frame>
        <draw:frame draw:style-name="gr13" draw:text-style-name="P4" draw:layer="layout" svg:width="20.8cm" svg:height="3.806cm" svg:x="5.8cm" svg:y="5.4cm">
          <draw:text-box>
            <text:p>A plugin / executable to simulate a drum.</text:p>
            <text:p>The current drumkits are rather metal oriented:</text:p>
            <text:p>- Drskit</text:p>
            <text:p>- Muldjordkit</text:p>
            <text:p>- Aasimonster</text:p>
          </draw:text-box>
        </draw:frame>
        <draw:frame draw:style-name="gr2" draw:text-style-name="P1" draw:layer="layout" svg:width="6.23cm" svg:height="4.67cm" svg:x="17.67cm" svg:y="10.13cm">
          <draw:image xlink:href="Pictures/10000001000001F400000177665FA426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6cm" svg:x="10.37cm" svg:y="10.2cm">
          <draw:image xlink:href="Pictures/10000001000001F400000176A06F615F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7cm" svg:x="3cm" svg:y="10.163cm">
          <draw:image xlink:href="Pictures/10000001000001F400000177FE1BEC2E.png" xlink:type="simple" xlink:show="embed" xlink:actuate="onLoad" draw:mime-type="image/png">
            <text:p/>
          </draw:image>
        </draw:frame>
        <draw:line draw:style-name="gr20" draw:text-style-name="P1" draw:layer="layout" svg:x1="7.8cm" svg:y1="9.206cm" svg:x2="6.6cm" svg:y2="10.6cm">
          <text:p/>
        </draw:line>
        <draw:line draw:style-name="gr20" draw:text-style-name="P1" draw:layer="layout" svg:x1="10.2cm" svg:y1="8.2cm" svg:x2="12.6cm" svg:y2="10.4cm">
          <text:p/>
        </draw:line>
        <draw:line draw:style-name="gr20" draw:text-style-name="P1" draw:layer="layout" svg:x1="9.2cm" svg:y1="7.4cm" svg:x2="18.4cm" svg:y2="10.13cm">
          <text:p/>
        </draw:line>
        <draw:frame draw:style-name="gr21" draw:text-style-name="P4" draw:layer="layout" svg:width="15.2cm" svg:height="1cm" svg:x="6cm" svg:y="15.6cm">
          <draw:text-box>
            <text:p>https://www.drumgizmo.org/wiki/doku.php?id=start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aasimonster</text:p>
          </draw:text-box>
        </draw:frame>
        <draw:frame draw:style-name="gr2" draw:text-style-name="P1" draw:layer="layout" svg:width="10.582cm" svg:height="8.466cm" svg:x="8.849cm" svg:y="6.335cm">
          <draw:image xlink:href="Pictures/1000000100000190000001401DB7F518.png" xlink:type="simple" xlink:show="embed" xlink:actuate="onLoad" draw:mime-type="image/png">
            <text:p/>
          </draw:image>
        </draw:frame>
        <draw:frame draw:style-name="gr22" draw:text-style-name="P10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Aasimonster - Micros</text:p>
          </draw:text-box>
        </draw:frame>
        <draw:frame draw:style-name="gr23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ph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Aasimonster - Canals</text:p>
          </draw:text-box>
        </draw:frame>
        <draw:frame draw:style-name="gr2" draw:text-style-name="P1" draw:layer="layout" svg:width="14.79cm" svg:height="10.32cm" svg:x="13.51cm" svg:y="7.1cm">
          <draw:image xlink:href="Pictures/100000010000031200000224A3114AA3.png" xlink:type="simple" xlink:show="embed" xlink:actuate="onLoad" draw:mime-type="image/png">
            <text:p/>
          </draw:image>
        </draw:frame>
        <draw:frame draw:style-name="gr24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Midi Ch 1: Overhead left (RØDE-NT5)</text:p>
            <text:p>Midi Ch 2: Overhead right (RØDE-NT5)</text:p>
            <text:p>Midi Ch 3: Snare top (Shure SM57)</text:p>
            <text:p>Midi Ch 4: Snare bottom (Shure SM57)</text:p>
            <text:p>Midi Ch 5: Snare trigger (DDrum)</text:p>
            <text:p>Midi Ch 6: Alesis DM5</text:p>
            <text:p>Midi Ch 7: Kick right (AKG D112)</text:p>
            <text:p>Midi Ch 8: Kick left (AKG D112)</text:p>
            <text:p>Midi Ch 9: Hihat (Cardioid condenser)</text:p>
            <text:p>Midi Ch 10: Rise cymbal (Cardioid condenser)</text:p>
            <text:p>Midi Ch 11: Tom 1 (AKG C518M)</text:p>
            <text:p>Midi Ch 12: Tom 2 (AKG C518M)</text:p>
            <text:p>Midi Ch 13: Tom 3 (AKG C518M)</text:p>
            <text:p>Midi Ch 14: Tom 4 / floor tom (AKG C518M)</text:p>
            <text:p>Midi Ch 15: Ambience left (Cardioid condenser)</text:p>
            <text:p>Midi Ch 16: Ambience right (Cardioid condenser)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DRSKit</text:p>
          </draw:text-box>
        </draw:frame>
        <draw:frame draw:style-name="gr2" draw:text-style-name="P1" draw:layer="layout" svg:width="13.228cm" svg:height="9.921cm" svg:x="7.526cm" svg:y="5.622cm">
          <draw:image xlink:href="Pictures/10000001000001F400000177A479DC6D.png" xlink:type="simple" xlink:show="embed" xlink:actuate="onLoad" draw:mime-type="image/png">
            <text:p/>
          </draw:image>
        </draw:frame>
        <draw:frame draw:style-name="gr25" draw:text-style-name="P10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DRSKIT - Micros</text:p>
          </draw:text-box>
        </draw:frame>
        <draw:frame draw:style-name="gr16" draw:text-style-name="P4" draw:layer="layout" svg:width="26.4cm" svg:height="10.205cm" svg:x="1cm" svg:y="5cm">
          <draw:text-box>
            <text:p>Close mic: Snare top: Shure Sm57</text:p>
            <text:p>Close mic: Snare bottom: Shure Sm57</text:p>
            <text:p>Close mic: Tom1: Shure Sm57</text:p>
            <text:p>Close mic: Tom2: Shure Sm57</text:p>
            <text:p>Close mic: Tom3: Shure Sm57</text:p>
            <text:p>Close mic: Kick drum back: AKG D112</text:p>
            <text:p>Close mic: Kick drum front: Shure Sm57</text:p>
            <text:p>Close mic: Ride cymbal: Beyerdynamic MCE 86 II</text:p>
            <text:p>Close mic: Hihat: Beyerdynamic MCE 86 II</text:p>
            <text:p>Overhead: Focusing on left crash and hihat: Røde Nt5</text:p>
            <text:p>Overhead: Focusing on right crash and ride: Røde Nt5</text:p>
            <text:p>Ambience: Focusing on entire kit placed further back in the room to the left: t.bone Rb500</text:p>
            <text:p>Ambience: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DRSKIT - Canals</text:p>
          </draw:text-box>
        </draw:frame>
        <draw:frame draw:style-name="gr26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Midi Ch 1: Ambience left</text:p>
            <text:p>Midi Ch 2: Ambience right</text:p>
            <text:p>Midi Ch 3: Kickdrum back</text:p>
            <text:p>Midi Ch 4: Kickdrum front</text:p>
            <text:p>Midi Ch 5: Hihat</text:p>
            <text:p>Midi Ch 6: Overhead left</text:p>
            <text:p>Midi Ch 7: Overhead right</text:p>
            <text:p>Midi Ch 8: Ride cymbal</text:p>
            <text:p>Midi Ch 9: Snaredrum bottom</text:p>
            <text:p>Midi Ch 10: Snaredrum top</text:p>
            <text:p>Midi Ch 11: Tom1</text:p>
            <text:p>Midi Ch 12: Tom2 (Floor tom)</text:p>
            <text:p>Midi Ch 13: Tom3 (Floor tom)</text:p>
          </draw:text-box>
        </draw:frame>
        <draw:frame draw:style-name="gr2" draw:text-style-name="P1" draw:layer="layout" svg:width="16.79cm" svg:height="11.71cm" svg:x="10.2cm" svg:y="6.89cm">
          <draw:image xlink:href="Pictures/100000010000031200000224C5295F8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Muldjordkit</text:p>
          </draw:text-box>
        </draw:frame>
        <draw:frame draw:style-name="gr2" draw:text-style-name="P1" draw:layer="layout" svg:width="13.228cm" svg:height="9.894cm" svg:x="7.526cm" svg:y="5.221cm">
          <draw:image xlink:href="Pictures/10000001000001F400000176A06F615F.png" xlink:type="simple" xlink:show="embed" xlink:actuate="onLoad" draw:mime-type="image/png">
            <text:p/>
          </draw:image>
        </draw:frame>
        <draw:frame draw:style-name="gr25" draw:text-style-name="P10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Muldjordkit - Micros</text:p>
          </draw:text-box>
        </draw:frame>
        <draw:frame draw:style-name="gr27" draw:text-style-name="P4" draw:layer="layout" svg:width="24.4cm" svg:height="13.4cm" svg:x="1.5cm" svg:y="5cm">
          <draw:text-box>
            <text:p>Close mic: Snare top: Shure Sm57</text:p>
            <text:p>Close mic: Snare bottom: Shure Sm57</text:p>
            <text:p>Close mic: Tom1: AKG C516 ML</text:p>
            <text:p>Close mic: Tom2: AKG C516 ML</text:p>
            <text:p>Close mic: Tom3: AKG C516 ML</text:p>
            <text:p>Close mic: FTom4: AKG C516 ML</text:p>
            <text:p>Close mic: Kick drum left inside barrel: AKG D112 + DDrum trigger</text:p>
            <text:p>Close mic: Kick drum right inside barrel: AKG D112 + DDrum trigger</text:p>
            <text:p>Close mic: Ride cymbal left: Shure Sm57</text:p>
            <text:p>Close mic: Ride cymbal right: Shure Sm57</text:p>
            <text:p>Close mic: Hihat: Shure Sm57</text:p>
            <text:p>Overhead left: <text:tab/>Røde Nt5</text:p>
            <text:p>Overhead right: <text:tab/>Røde Nt5</text:p>
            <text:p>Ambience: Focusing on entire kit placed a little further back in the room to the left: </text:p>
            <text:p><text:tab/><text:tab/><text:tab/>t.bone Rb500</text:p>
            <text:p>Ambience: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Muldjordkit - Canals</text:p>
          </draw:text-box>
        </draw:frame>
        <draw:frame draw:style-name="gr24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Midi Ch 1: Ambience left</text:p>
            <text:p>Midi Ch 2: Ambience right</text:p>
            <text:p>Midi Ch 3: Hihat</text:p>
            <text:p>Midi Ch 4: Kickdrum left</text:p>
            <text:p>Midi Ch 5: Kickdrum right</text:p>
            <text:p>Midi Ch 6: Overhead left</text:p>
            <text:p>Midi Ch 7: Overhead right</text:p>
            <text:p>Midi Ch 8: Ride left</text:p>
            <text:p>Midi Ch 9: Ride right</text:p>
            <text:p>Midi Ch 10: Snare bottom</text:p>
            <text:p>Midi Ch 11: Snare top</text:p>
            <text:p>Midi Ch 12: Rack tom 1</text:p>
            <text:p>Midi Ch 13: Rack tom 2</text:p>
            <text:p>Midi Ch 14: Rack tom 3</text:p>
            <text:p>Midi Ch 15: Floor tom</text:p>
            <text:p>Midi Ch 16: Kick drum trigger signals</text:p>
          </draw:text-box>
        </draw:frame>
        <draw:frame draw:style-name="gr2" draw:text-style-name="P1" draw:layer="layout" svg:width="16.79cm" svg:height="11.71cm" svg:x="10.41cm" svg:y="6.69cm">
          <draw:image xlink:href="Pictures/1000000100000312000002248D94296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Hydrogen plugins</text:p>
          </draw:text-box>
        </draw:frame>
        <draw:frame draw:style-name="gr1" draw:text-style-name="P1" draw:layer="layout" svg:width="10.212cm" svg:height="7.196cm" svg:x="1.3cm" svg:y="4.4cm">
          <draw:image xlink:href="Pictures/100000010000018200000110E8A1D02F.png" xlink:type="simple" xlink:show="embed" xlink:actuate="onLoad" draw:mime-type="image/png">
            <text:p/>
          </draw:image>
        </draw:frame>
        <draw:frame draw:style-name="gr1" draw:text-style-name="P1" draw:layer="layout" svg:width="7.875cm" svg:height="7.841cm" svg:x="10.125cm" svg:y="11.675cm">
          <draw:image xlink:href="Pictures/10000001000002AE000002AB1E03BB83.png" xlink:type="simple" xlink:show="embed" xlink:actuate="onLoad" draw:mime-type="image/png">
            <text:p/>
          </draw:image>
        </draw:frame>
        <draw:frame draw:style-name="gr28" draw:text-style-name="P4" draw:layer="layout" svg:width="4cm" svg:height="0.962cm" svg:x="3.6cm" svg:y="11.8cm">
          <draw:text-box>
            <text:p>drumlabooh</text:p>
          </draw:text-box>
        </draw:frame>
        <draw:frame draw:style-name="gr1" draw:text-style-name="P1" draw:layer="layout" svg:width="8.515cm" svg:height="7.064cm" svg:x="18.085cm" svg:y="4.511cm">
          <draw:image xlink:href="Pictures/1000000100000195000001509054675F.png" xlink:type="simple" xlink:show="embed" xlink:actuate="onLoad" draw:mime-type="image/png">
            <text:p/>
          </draw:image>
        </draw:frame>
        <draw:frame draw:style-name="gr28" draw:text-style-name="P4" draw:layer="layout" svg:width="3cm" svg:height="0.962cm" svg:x="21.2cm" svg:y="11.575cm">
          <draw:text-box>
            <text:p>drumrox</text:p>
          </draw:text-box>
        </draw:frame>
        <draw:frame draw:style-name="gr28" draw:text-style-name="P4" draw:layer="layout" svg:width="2cm" svg:height="0.962cm" svg:x="13.4cm" svg:y="10.4cm">
          <draw:text-box>
            <text:p>drmr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on_25_20Linux" presentation:presentation-page-layout-name="AL2T19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Other drum plugins</text:p>
          </draw:text-box>
        </draw:frame>
        <draw:frame draw:style-name="gr29" draw:text-style-name="P4" draw:layer="layout" svg:width="25.4cm" svg:height="14.471cm" svg:x="1.2cm" svg:y="4.6cm">
          <draw:text-box>
            <text:p><text:span text:style-name="T3">drumgizmo</text:span> : Software Synthesizer</text:p>
            <text:p><text:span text:style-name="T3">ChowKick</text:span> : Kick synthesizer based on old-school drum machine circuits</text:p>
            <text:p><text:span text:style-name="T3">boomer</text:span> : A drum synth</text:p>
            <text:p><text:span text:style-name="T3">geonkick</text:span> : Drum Software Synthesizer</text:p>
            <text:p><text:span text:style-name="T3">kickmess</text:span> : A kick drum synthesizer plugin</text:p>
            <text:p><text:span text:style-name="T3">lv2-fabla</text:span> : An LV2 drum sequencer</text:p>
            <text:p><text:span text:style-name="T3">onetrick-cryptid</text:span> : An FM drum synth with the cold clanging heart of a DX7 in the fearsome frame of an 808.</text:p>
            <text:p><text:span text:style-name="T3">onetrick-urchin</text:span> : A hybrid drum synth that models the gritty lo-fi sound of beats from vintage records without sampling.</text:p>
            <text:p><text:span text:style-name="T3">sickbeatbetty</text:span> : An open source MIDI drum machine / generator VST and standalone application</text:p>
            <text:p><text:span text:style-name="T3">AVLDrumkits-BlackPearl-H2-repack</text:span> : Hydrogen drumkit</text:p>
            <text:p><text:span text:style-name="T3">AVLDrumkits-BlondeBop-HotRod.h2d</text:span> : Hydrogen drumkit</text:p>
            <text:p><text:span text:style-name="T3">AVLDrumkits-BlondeBop.h2d</text:span> : Hydrogen drumkit</text:p>
            <text:p><text:span text:style-name="T3">AVLDrumkits-BuskmansHoliday </text:span>: Hydrogen drumkit</text:p>
            <text:p><text:span text:style-name="T3">AVLDrumkits-RedZeppelin-H2-repack.h2d</text:span> : Hydrogen drumkit</text:p>
            <text:p><text:span text:style-name="T3">bandshed-drumkits</text:span> : Bandshed DrumKits for Hydrogen</text:p>
            <text:p><text:span text:style-name="T3">drumkv1</text:span> : An old-school drum-kit sampler </text:p>
            <text:p><text:span text:style-name="T3">lv2-avldrums-x42-plugin</text:span> : Simple Drum Sample Player LV2 Plugin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on_25_20Linux" presentation:presentation-page-layout-name="AL2T19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Other drum plugins</text:p>
          </draw:text-box>
        </draw:frame>
        <draw:frame draw:style-name="gr29" draw:text-style-name="P4" draw:layer="layout" svg:width="25.4cm" svg:height="14.471cm" svg:x="1.2cm" svg:y="4.6cm">
          <draw:text-box>
            <text:p><text:span text:style-name="T3">drumelidrum</text:span> : drum machine VST3 plugin</text:p>
            <text:p><text:span text:style-name="T3">drumgroovepro</text:span> : A free open-source MIDI drum groove sequencer</text:p>
            <text:p><text:span text:style-name="T3">drumlabooh</text:span> : A drum machine that can use Hydrogen / SFZ an other drumkits</text:p>
            <text:p text:style-name="P11"><text:span text:style-name="T3">drumrox : </text:span><text:span text:style-name="T4">A hydrogen compatible drum LV2 plugin</text:span></text:p>
            <text:p><text:span text:style-name="T3">drummock</text:span> : A simple drum sampler</text:p>
            <text:p text:style-name="P11"><text:span text:style-name="T3">drumcracker : </text:span><text:span text:style-name="T4">A drum sampler compatible with drumgizmo drumkits</text:span></text:p>
            <text:p><text:span text:style-name="T3">jdrummer</text:span> : An open source drum plugin that acts as an alternative to EZDrummer3</text:p>
            <text:p/>
          </draw:text-box>
        </draw:frame>
        <presentation:notes draw:style-name="dp4">
          <draw:page-thumbnail draw:style-name="gr6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1-30T20:10:27.976000000</meta:creation-date>
    <dc:date>2026-05-23T10:16:12.977129593</dc:date>
    <meta:editing-duration>PT3H33M22S</meta:editing-duration>
    <meta:editing-cycles>32</meta:editing-cycles>
    <meta:generator>LibreOffice/25.8.7.3$Linux_X86_64 LibreOffice_project/580$Build-3</meta:generator>
    <meta:document-statistic meta:object-count="201"/>
  </office:meta>
</office:document-meta>
</file>