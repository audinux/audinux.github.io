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13d" officeooo:paragraph-rsid="001ed13d"/>
    </style:style>
    <style:style style:name="P2" style:family="paragraph" style:parent-style-name="Standard">
      <style:paragraph-properties fo:break-before="page"/>
      <style:text-properties officeooo:rsid="001ed13d" officeooo:paragraph-rsid="001ed1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udinux</text:p>
      <text:p text:style-name="P1"/>
      <text:p text:style-name="P1">Un dépôt de logiciels pour l’audio et la musique pour Fedora.</text:p>
      <text:p text:style-name="P1">Des outils, des plugins, des facilités pour le réglage.</text:p>
      <text:p text:style-name="P1"/>
      <text:p text:style-name="P1">Les liens importants :</text:p>
      <text:p text:style-name="P1"><text:a xlink:type="simple" xlink:href="https://audinux.github.io/" text:style-name="Internet_20_link" text:visited-style-name="Visited_20_Internet_20_Link">https://audinux.github.io</text:a></text:p>
      <text:p text:style-name="P1"><text:a xlink:type="simple" xlink:href="https://copr.fedorainfracloud.org/coprs/ycollet/audinux" text:style-name="Internet_20_link" text:visited-style-name="Visited_20_Internet_20_Link">https://copr.fedorainfracloud.org/coprs/ycollet/audinux</text:a></text:p>
      <text:p text:style-name="P1"><text:a xlink:type="simple" xlink:href="https://github.com/audinux/fedora-spec" text:style-name="Internet_20_link" text:visited-style-name="Visited_20_Internet_20_Link">https://github.com/audinux/fedora-spec</text:a></text:p>
      <text:p text:style-name="P1"><text:a xlink:type="simple" xlink:href="https://linktr.ee/ycollet" text:style-name="Internet_20_link" text:visited-style-name="Visited_20_Internet_20_Link">https://linktr.ee/ycollet</text:a></text:p>
      <text:p text:style-name="P1"/>
      <text:p text:style-name="P1">Des compositions utilisant Fedora / Audinux :</text:p>
      <text:p text:style-name="P1"><text:a xlink:type="simple" xlink:href="https://www.jamendo.com/artist/471813/joseph-curwen/albums" text:style-name="Internet_20_link" text:visited-style-name="Visited_20_Internet_20_Link">https://www.jamendo.com/artist/471813/joseph-curwen/albums</text:a></text:p>
      <text:p text:style-name="P1"><text:a xlink:type="simple" xlink:href="https://www.jamendo.com/artist/537917/ufo-sighting/albums" text:style-name="Internet_20_link" text:visited-style-name="Visited_20_Internet_20_Link">https://www.jamendo.com/artist/537917/ufo-sighting/albums</text:a></text:p>
      <text:p text:style-name="P1"/>
      <text:p text:style-name="P1">Des articles mettant en œuvre ce dépôt :</text:p>
      <text:p text:style-name="P1"><text:a xlink:type="simple" xlink:href="https://fedoramagazine.org/?s=ycollet" text:style-name="Internet_20_link" text:visited-style-name="Visited_20_Internet_20_Link">https://fedoramagazine.org/?s=ycollet</text:a></text:p>
      <text:p text:style-name="P1"/>
      <text:p text:style-name="P1">Une chaine youtube avec des démonstrations :</text:p>
      <text:p text:style-name="P1"><text:a xlink:type="simple" xlink:href="https://www.youtube.com/@YannCOLLETTE" text:style-name="Internet_20_link" text:visited-style-name="Visited_20_Internet_20_Link">https://www.youtube.com/@YannCOLLETTE</text:a></text:p>
      <text:p text:style-name="P1"/>
      <text:p text:style-name="P1">De la documentation sur les différents outils présents dans ce dépôt :</text:p>
      <text:p text:style-name="P1"><text:a xlink:type="simple" xlink:href="https://audinux.github.io/pages/workshops.html" text:style-name="Internet_20_link" text:visited-style-name="Visited_20_Internet_20_Link">https://audinux.github.io/pages/workshops.html</text:a></text:p>
      <text:p text:style-name="P1"/>
      <text:p text:style-name="P1">Un live de musique et de dance au Générateur à Gentilly:</text:p>
      <text:p text:style-name="P1"><text:a xlink:type="simple" xlink:href="https://www.youtube.com/watch?v=zcfJQBBnSaY" text:style-name="Internet_20_link" text:visited-style-name="Visited_20_Internet_20_Link">https://www.youtube.com/watch?v=zcfJQBBnSaY</text:a></text:p>
      <text:p text:style-name="P1"/>
      <text:p text:style-name="P1">Une émission de radio sur Linux et la musique durant laquelle j’ai été interviewé :</text:p>
      <text:p text:style-name="P1"><text:a xlink:type="simple" xlink:href="https://www.youtube.com/watch?v=XTIbeDmopC4" text:style-name="Internet_20_link" text:visited-style-name="Visited_20_Internet_20_Link">https://www.youtube.com/watch?v=XTIbeDmopC4</text:a></text:p>
      <text:p text:style-name="P1"/>
      <text:p text:style-name="P2">A software repository for audio and music for Fedora.</text:p>
      <text:p text:style-name="P1"/>
      <text:p text:style-name="P1">Tools, plugins, and features for easy setup.</text:p>
      <text:p text:style-name="P1"/>
      <text:p text:style-name="P1">Important links:</text:p>
      <text:p text:style-name="P1"><text:a xlink:type="simple" xlink:href="https://audinux.github.io/" text:style-name="Internet_20_link" text:visited-style-name="Visited_20_Internet_20_Link">https://audinux.github.io</text:a></text:p>
      <text:p text:style-name="P1"><text:a xlink:type="simple" xlink:href="https://copr.fedorainfracloud.org/coprs/ycollet/audinux" text:style-name="Internet_20_link" text:visited-style-name="Visited_20_Internet_20_Link">https://copr.fedorainfracloud.org/coprs/ycollet/audinux</text:a></text:p>
      <text:p text:style-name="P1"><text:a xlink:type="simple" xlink:href="https://github.com/audinux/fedora-spec" text:style-name="Internet_20_link" text:visited-style-name="Visited_20_Internet_20_Link">https://github.com/audinux/fedora-spec</text:a></text:p>
      <text:p text:style-name="P1"><text:a xlink:type="simple" xlink:href="https://linktr.ee/ycollet" text:style-name="Internet_20_link" text:visited-style-name="Visited_20_Internet_20_Link">https://linktr.ee/ycollet</text:a></text:p>
      <text:p text:style-name="P1"/>
      <text:p text:style-name="P1">Compositions using Fedora/Audinux:</text:p>
      <text:p text:style-name="P1"><text:a xlink:type="simple" xlink:href="https://www.jamendo.com/artist/471813/joseph-curwen/albums" text:style-name="Internet_20_link" text:visited-style-name="Visited_20_Internet_20_Link">https://www.jamendo.com/artist/471813/joseph-curwen/albums</text:a></text:p>
      <text:p text:style-name="P1"><text:a xlink:type="simple" xlink:href="https://www.jamendo.com/artist/537917/ufo-sighting/albums" text:style-name="Internet_20_link" text:visited-style-name="Visited_20_Internet_20_Link">https://www.jamendo.com/artist/537917/ufo-sighting/albums</text:a></text:p>
      <text:p text:style-name="P1"/>
      <text:p text:style-name="P1">Articles implementing this repository:</text:p>
      <text:p text:style-name="P1"><text:a xlink:type="simple" xlink:href="https://fedoramagazine.org/?s=ycollet" text:style-name="Internet_20_link" text:visited-style-name="Visited_20_Internet_20_Link">https://fedoramagazine.org/?s=ycollet</text:a></text:p>
      <text:p text:style-name="P1"/>
      <text:p text:style-name="P1">A YouTube channel with demonstrations:</text:p>
      <text:p text:style-name="P1"><text:a xlink:type="simple" xlink:href="https://www.youtube.com/@YannCOLLETTE" text:style-name="Internet_20_link" text:visited-style-name="Visited_20_Internet_20_Link">https://www.youtube.com/@YannCOLLETTE</text:a></text:p>
      <text:p text:style-name="P1"/>
      <text:p text:style-name="P1">Documentation on the various tools in this repository:</text:p>
      <text:p text:style-name="P1"><text:a xlink:type="simple" xlink:href="https://audinux.github.io/pages/workshops.html" text:style-name="Internet_20_link" text:visited-style-name="Visited_20_Internet_20_Link">https://audinux.github.io/pages/workshops.html</text:a></text:p>
      <text:p text:style-name="P1"/>
      <text:p text:style-name="P1">A live music and dance performance at Le Générateur Gentilly:</text:p>
      <text:p text:style-name="P1"><text:a xlink:type="simple" xlink:href="https://www.youtube.com/watch?v=zcfJQBBnSaY" text:style-name="Internet_20_link" text:visited-style-name="Visited_20_Internet_20_Link">https://www.youtube.com/watch?v=zcfJQBBnSaY</text:a></text:p>
      <text:p text:style-name="P1"/>
      <text:p text:style-name="P1"/>
      <text:p text:style-name="P1">A radio show about Linux and music during which I was interviewed:</text:p>
      <text:p text:style-name="P1"><text:a xlink:type="simple" xlink:href="https://www.youtube.com/watch?v=XTIbeDmopC4" text:style-name="Internet_20_link" text:visited-style-name="Visited_20_Internet_20_Link">https://www.youtube.com/watch?v=XTIbeDmopC4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19:20:50.975950362</meta:creation-date>
    <dc:date>2026-06-09T19:32:11.353416840</dc:date>
    <meta:editing-duration>PT1M3S</meta:editing-duration>
    <meta:editing-cycles>2</meta:editing-cycles>
    <meta:generator>LibreOffice/25.8.7.3$Linux_X86_64 LibreOffice_project/580$Build-3</meta:generator>
    <meta:document-statistic meta:table-count="0" meta:image-count="0" meta:object-count="0" meta:page-count="2" meta:paragraph-count="41" meta:word-count="167" meta:character-count="1815" meta:non-whitespace-character-count="1689"/>
  </office:meta>
</office:document-meta>
</file>