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D000000FD7887FD57.png" manifest:media-type="image/png"/>
  <manifest:file-entry manifest:full-path="Pictures/10000001000002BC0000012FB78CFBDD.png" manifest:media-type="image/png"/>
  <manifest:file-entry manifest:full-path="Pictures/10000001000002BC000000A5945BF641.png" manifest:media-type="image/png"/>
  <manifest:file-entry manifest:full-path="Pictures/10000001000002BC0000006C8E314663.png" manifest:media-type="image/png"/>
  <manifest:file-entry manifest:full-path="Pictures/10000001000002BC0000006C402B8829.png" manifest:media-type="image/png"/>
  <manifest:file-entry manifest:full-path="Pictures/10000001000002BC0000006C33B188B5.png" manifest:media-type="image/png"/>
  <manifest:file-entry manifest:full-path="Pictures/10000001000002BC0000006C90A0582E.png" manifest:media-type="image/png"/>
  <manifest:file-entry manifest:full-path="Pictures/1000000100000300000001E307791280.png" manifest:media-type="image/png"/>
  <manifest:file-entry manifest:full-path="Pictures/1000000000000330000001594821F7C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ter" svg:font-family="Inter"/>
    <style:font-face style:name="Inter1" svg:font-family="Inter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Preformatted_20_Text">
      <style:paragraph-properties fo:margin-left="0cm" fo:margin-right="0cm" fo:text-indent="0cm" style:auto-text-indent="false"/>
    </style:style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P27" style:family="paragraph" style:parent-style-name="Text_20_body" style:list-style-name="L11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fedoramagazine.org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#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post-43090">
        <text:h text:style-name="P1" text:outline-level="1">JSFX on Fedora Linux: an ultra-fast audio prototyping engine</text:h>
        <text:p text:style-name="P2">Posted by <text:a xlink:type="simple" xlink:href="https://fedoramagazine.org/author/ycollet/" text:style-name="Internet_20_link" text:visited-style-name="Visited_20_Internet_20_Link">Yann Collette</text:a> on <text:a xlink:type="simple" xlink:href="https://fedoramagazine.org/jsfx-on-fedora-linux-an-ultra-fast-audio-prototyping-engine/" text:style-name="Internet_20_link" text:visited-style-name="Visited_20_Internet_20_Link">March 13, 2026</text:a> </text:p>
        <text:p text:style-name="Text_20_body"><draw:frame draw:style-name="fr1" draw:name="Image2" text:anchor-type="as-char" svg:width="17cm" svg:height="9.13cm" draw:z-index="0"><draw:image xlink:href="Pictures/1000000000000330000001594821F7C3.jpg" xlink:type="simple" xlink:show="embed" xlink:actuate="onLoad" draw:mime-type="image/jpeg"/></draw:frame><text:s/></text:p>
        <text:h text:style-name="Heading_20_2" text:outline-level="2">Introduction</text:h>
        <text:p text:style-name="Text_20_body">Writing a real-time audio plugin on Linux often conjures up images of a complex environment: C++, toolchains, CMake, CLAP / VST3 / LV2 SDK, ABI…</text:p>
        <text:p text:style-name="Text_20_body">However, there is a much simpler approach : JSFX </text:p>
        <text:p text:style-name="Text_20_body">This article offers a practical introduction to JSFX and YSFX on Fedora Linux: we’ll write some small examples, add a graphical VU meter, and then see how to use it as an CLAP / VST3 plugin in a native Linux workflow.</text:p>
        <text:p text:style-name="P3"><text:bookmark text:name="more-43090"/>JSFX (JesuSonic Effects – created by REAPER [<text:bookmark text:name="#reference_7"/><text:a xlink:type="simple" xlink:href="https://fedoramagazine.org/jsfx-on-fedora-linux-an-ultra-fast-audio-prototyping-engine/#reference_7" text:style-name="Internet_20_link" text:visited-style-name="Visited_20_Internet_20_Link">7</text:a>]) allows you to write audio plugins in just a few lines, without compilation, with instant reloading and live editing.</text:p>
        <text:p text:style-name="P3">Long associated with REAPER, they are now natively usable on Linux, thanks to YSFX [<text:bookmark text:name="#reference_3"/><text:a xlink:type="simple" xlink:href="https://fedoramagazine.org/jsfx-on-fedora-linux-an-ultra-fast-audio-prototyping-engine/#reference_3" text:style-name="Internet_20_link" text:visited-style-name="Visited_20_Internet_20_Link">3</text:a>], available on Fedora Linux in CLAP and VST3 formats via the Audinux repository ([<text:bookmark text:name="#reference_4"/><text:a xlink:type="simple" xlink:href="https://fedoramagazine.org/jsfx-on-fedora-linux-an-ultra-fast-audio-prototyping-engine/#reference_4" text:style-name="Internet_20_link" text:visited-style-name="Visited_20_Internet_20_Link">4</text:a>], [<text:bookmark text:name="#reference_5"/><text:a xlink:type="simple" xlink:href="https://fedoramagazine.org/jsfx-on-fedora-linux-an-ultra-fast-audio-prototyping-engine/#reference_5" text:style-name="Internet_20_link" text:visited-style-name="Visited_20_Internet_20_Link">5</text:a>]).</text:p>
        <text:p text:style-name="P3">This means it’s possible to write a functional audio effect in ten lines, then immediately load it into Carla [<text:bookmark text:name="#reference_8"/><text:a xlink:type="simple" xlink:href="https://fedoramagazine.org/jsfx-on-fedora-linux-an-ultra-fast-audio-prototyping-engine/#reference_8" text:style-name="Internet_20_link" text:visited-style-name="Visited_20_Internet_20_Link">8</text:a>], Ardour [<text:bookmark text:name="#reference_9"/><text:a xlink:type="simple" xlink:href="https://fedoramagazine.org/jsfx-on-fedora-linux-an-ultra-fast-audio-prototyping-engine/#reference_9" text:style-name="Internet_20_link" text:visited-style-name="Visited_20_Internet_20_Link">9</text:a>], or any other compatible host, all within a PipeWire / JACK [<text:bookmark text:name="#reference_11"/><text:a xlink:type="simple" xlink:href="https://fedoramagazine.org/jsfx-on-fedora-linux-an-ultra-fast-audio-prototyping-engine/#reference_11" text:style-name="Internet_20_link" text:visited-style-name="Visited_20_Internet_20_Link">11</text:a>] environment.</text:p>
        <text:p text:style-name="P3">A citation from [<text:bookmark text:name="#reference_1"/><text:a xlink:type="simple" xlink:href="https://fedoramagazine.org/jsfx-on-fedora-linux-an-ultra-fast-audio-prototyping-engine/#reference_1" text:style-name="Internet_20_link" text:visited-style-name="Visited_20_Internet_20_Link">1</text:a>] (check the [<text:bookmark text:name="#reference_1 Copie 1"/><text:a xlink:type="simple" xlink:href="https://fedoramagazine.org/jsfx-on-fedora-linux-an-ultra-fast-audio-prototyping-engine/#reference_1" text:style-name="Internet_20_link" text:visited-style-name="Visited_20_Internet_20_Link">1]</text:a> link for images):</text:p>
        <text:p text:style-name="Quotations">In 2004, before we started developing REAPER, we created software designed for creating and modifying FX live, primarily for use with guitar processing.</text:p>
        <text:p text:style-name="Quotations">The plan was that it could run on a minimal Linux distribution on dedicated hardware, for stage use. We built a couple of prototypes.</text:p>
        <text:p text:style-name="Quotations"><text:soft-page-break/>These hand-built prototypes used mini-ITX mainboards with either Via or Intel P-M CPUs, cheap consumer USB audio devices, and Atmel AVR microcontrollers via RS-232 for the footboard controls.</text:p>
        <text:p text:style-name="Quotations">The cost for the parts used was around $600 each.</text:p>
        <text:p text:style-name="Quotations">In the end, however, we concluded that we preferred to be in the software business, not the hardware business, and our research into adding multi-track capabilities in JSFX led us to develop REAPER. Since then, REAPER has integrated much of JSFX’s functionality, and improved on it.</text:p>
        <text:p text:style-name="P3">So, as you can see, this technology is not that new. But the Linux support via YSFX [<text:bookmark text:name="#reference_3 Copie 1"/><text:a xlink:type="simple" xlink:href="https://fedoramagazine.org/jsfx-on-fedora-linux-an-ultra-fast-audio-prototyping-engine/#reference_3" text:style-name="Internet_20_link" text:visited-style-name="Visited_20_Internet_20_Link">3</text:a>] is rather new (Nov 2021, started by Jean-Pierre Cimalando).</text:p>
        <text:p text:style-name="Text_20_body">A new programming language, but for what ? What would one would use JSFX for ?</text:p>
        <text:p text:style-name="Text_20_body">This language is dedicated to audio and with it, you can write audio effects like an amplifier, a chorus, a delay, a compressor, or you can write synthesizers.</text:p>
        <text:p text:style-name="Text_20_body">JSFX is good for rapid prototyping and, once everything is in place, you can then rewrite your project into a more efficient language like C, C++, or Rust.</text:p>
        <text:h text:style-name="Heading_20_2" text:outline-level="2">JSFX for developers</text:h>
        <text:p text:style-name="Text_20_body">Developing an audio plugin on Linux often involves a substantial technical environment. This complexity can be a hindrance when trying out an idea quickly.</text:p>
        <text:p text:style-name="Text_20_body">JSFX (JesuSonic Effects) offers a different approach: writing audio effects in just a few lines of interpreted code, without compilation and with instant reloading.</text:p>
        <text:p text:style-name="Text_20_body">Thanks to YSFX, available on Fedora Linux in CLAP and VST3 formats, these scripts can be used as true plugins within the Linux audio ecosystem.</text:p>
        <text:p text:style-name="Text_20_body">This article will explore how to write a minimal amplifier in JSFX, add a graphical VU meter, and then load it into Carla as a CLAP / VST3 plugin.</text:p>
        <text:p text:style-name="Text_20_body">The goal is simple: to demonstrate that it is possible to prototype real-time audio processing on Fedora Linux in just a few minutes.</text:p>
        <text:p text:style-name="Text_20_body">No compilation environment is required: a text editor is all you need.</text:p>
        <text:h text:style-name="Heading_20_2" text:outline-level="2">YSFX plugin</text:h>
        <text:p text:style-name="Text_20_body">On Fedora Linux, YSFX comes in 3 flavours :</text:p>
        <text:list text:style-name="L1">
          <text:list-item>
            <text:p text:style-name="P4">a standalone executable ; </text:p>
          </text:list-item>
          <text:list-item>
            <text:p text:style-name="P4">a VST3 plugin ; </text:p>
          </text:list-item>
          <text:list-item>
            <text:p text:style-name="P5">a CLAP plugin. </text:p>
          </text:list-item>
        </text:list>
        <text:p text:style-name="P3">YSFX is available in the Audinux [<text:bookmark text:name="#reference_5 Copie 1"/><text:a xlink:type="simple" xlink:href="https://fedoramagazine.org/jsfx-on-fedora-linux-an-ultra-fast-audio-prototyping-engine/#reference_5" text:style-name="Internet_20_link" text:visited-style-name="Visited_20_Internet_20_Link">5</text:a>] repository. So, first, install the Audinux repository:</text:p>
        <text:p text:style-name="P6"><text:span text:style-name="User_20_Entry">$ dnf copr enable ycollet/audinux</text:span></text:p>
        <text:p text:style-name="Text_20_body">Then, you can install the version you want:</text:p>
        <text:p text:style-name="Preformatted_20_Text"><text:soft-page-break/>$ dnf install ysfx</text:p>
        <text:p text:style-name="Preformatted_20_Text">$ dnf install vst3-ysfx</text:p>
        <text:p text:style-name="P6">$ dnf install clap-ysfx</text:p>
        <text:p text:style-name="P3">Here is a screenshot of YSFX as a VST3 plugin loaded in Carla Rack [<text:bookmark text:name="#reference_8 Copie 1"/><text:a xlink:type="simple" xlink:href="https://fedoramagazine.org/jsfx-on-fedora-linux-an-ultra-fast-audio-prototyping-engine/#reference_8" text:style-name="Internet_20_link" text:visited-style-name="Visited_20_Internet_20_Link">8</text:a>]:</text:p>
        <text:p text:style-name="Text_20_body"><draw:a xlink:type="simple" xlink:href="https://fedoramagazine.org/wp-content/uploads/2026/03/image.png"><draw:frame draw:style-name="fr2" draw:name="Image6" text:anchor-type="as-char" svg:width="17cm" svg:height="2.91cm" draw:z-index="1"><draw:image xlink:href="Pictures/10000001000002BC0000006C90A0582E.png" xlink:type="simple" xlink:show="embed" xlink:actuate="onLoad" draw:mime-type="image/png"/><svg:title>Screenshot of YSFX effect VST3 plugin loaded in Carla-rack</svg:title></draw:frame></draw:a><text:s/></text:p>
        <text:p text:style-name="Text_20_body">You can :</text:p>
        <text:list text:style-name="L2">
          <text:list-item>
            <text:p text:style-name="P7">Load a file ; </text:p>
          </text:list-item>
          <text:list-item>
            <text:p text:style-name="P7">Load a recent file ; </text:p>
          </text:list-item>
          <text:list-item>
            <text:p text:style-name="P7">Reload a file modified via the Edit menu ; </text:p>
          </text:list-item>
          <text:list-item>
            <text:p text:style-name="P7">Zoom / Unzoom via the <text:span text:style-name="Strong_20_Emphasis">1.0</text:span> button ; </text:p>
          </text:list-item>
          <text:list-item>
            <text:p text:style-name="P7">Load presets ; </text:p>
          </text:list-item>
          <text:list-item>
            <text:p text:style-name="P8">Switch between the <text:span text:style-name="Strong_20_Emphasis">Graphics</text:span> and <text:span text:style-name="Strong_20_Emphasis">Sliders</text:span> view. </text:p>
          </text:list-item>
        </text:list>
        <text:p text:style-name="Text_20_body">Here is a screenshot of the Edit window:</text:p>
        <text:p text:style-name="Text_20_body"><draw:frame draw:style-name="fr3" draw:name="Image1" text:anchor-type="char" svg:width="17cm" svg:height="10.691cm" draw:z-index="8"><draw:image xlink:href="Pictures/1000000100000300000001E307791280.png" xlink:type="simple" xlink:show="embed" xlink:actuate="onLoad" draw:mime-type="image/png"/></draw:frame>The  <text:span text:style-name="Strong_20_Emphasis">Variables</text:span>  column displays all the variables defined by the loaded file.</text:p>
        <text:h text:style-name="Heading_20_2" text:outline-level="2">Examples</text:h>
        <text:p text:style-name="P3">We will use the JSFX documentation available at [<text:bookmark text:name="#reference_4 Copie 1"/><text:a xlink:type="simple" xlink:href="https://fedoramagazine.org/jsfx-on-fedora-linux-an-ultra-fast-audio-prototyping-engine/#reference_4" text:style-name="Internet_20_link" text:visited-style-name="Visited_20_Internet_20_Link">4</text:a>].</text:p>
        <text:p text:style-name="Text_20_body">JSFX code is always divided into section.</text:p>
        <text:list text:style-name="L3">
          <text:list-item>
            <text:p text:style-name="P9"><text:soft-page-break/><text:span text:style-name="Strong_20_Emphasis">@init </text:span>: The code in the <text:span text:style-name="Strong_20_Emphasis">@init</text:span> section gets executed on effect load, on samplerate changes, and on start of playback. </text:p>
          </text:list-item>
          <text:list-item>
            <text:p text:style-name="P9"><text:span text:style-name="Strong_20_Emphasis">@slider</text:span> : The code in the <text:span text:style-name="Strong_20_Emphasis">@slider</text:span> section gets executed following an <text:span text:style-name="Strong_20_Emphasis">@init</text:span>, or when a parameter (slider) changes </text:p>
          </text:list-item>
          <text:list-item>
            <text:p text:style-name="P9"><text:span text:style-name="Strong_20_Emphasis">@block</text:span> : The code in the <text:span text:style-name="Strong_20_Emphasis">@block</text:span> section is executed before processing each sample block. Typically a block is the length as defined by the audio hardware, or anywhere from 128-2048 samples. </text:p>
          </text:list-item>
          <text:list-item>
            <text:p text:style-name="P9"><text:span text:style-name="Strong_20_Emphasis">@sample </text:span>: The code in the <text:span text:style-name="Strong_20_Emphasis">@sample</text:span> section is executed for every PCM (Pulse Code Modulation) audio sample. </text:p>
          </text:list-item>
          <text:list-item>
            <text:p text:style-name="P9"><text:span text:style-name="Strong_20_Emphasis">@serialize</text:span> : The code in the <text:span text:style-name="Strong_20_Emphasis">@serialize</text:span> section is executed when the plug-in needs to load or save some extended state. </text:p>
          </text:list-item>
          <text:list-item>
            <text:p text:style-name="P10"><text:span text:style-name="Strong_20_Emphasis">@gfx </text:span>[width] [height] : The <text:span text:style-name="Strong_20_Emphasis">@gfx</text:span> section gets executed around 30 times a second when the plug-ins GUI is open. </text:p>
          </text:list-item>
        </text:list>
        <text:h text:style-name="Heading_20_3" text:outline-level="3">A simple amplifier</text:h>
        <text:p text:style-name="Text_20_body">In this example, we will use a slider value to amplify the audio input.</text:p>
        <text:p text:style-name="Preformatted_20_Text">desc:Simple Amplifier</text:p>
        <text:p text:style-name="Preformatted_20_Text">slider1:1&lt;0,4,0.01&gt;Gain</text:p>
        <text:p text:style-name="Preformatted_20_Text"/>
        <text:p text:style-name="Preformatted_20_Text">@init</text:p>
        <text:p text:style-name="Preformatted_20_Text">gain = slider1;</text:p>
        <text:p text:style-name="Preformatted_20_Text"/>
        <text:p text:style-name="Preformatted_20_Text">@slider</text:p>
        <text:p text:style-name="Preformatted_20_Text">gain = slider1;</text:p>
        <text:p text:style-name="Preformatted_20_Text"/>
        <text:p text:style-name="Preformatted_20_Text">@sample</text:p>
        <text:p text:style-name="Preformatted_20_Text">spl0 *= gain;</text:p>
        <text:p text:style-name="P6">spl1 *= gain;</text:p>
        <text:p text:style-name="P3">slider1, @init, @slider, @sample, spl0, spl1 are JSFX keywords [<text:bookmark text:name="#reference_1 Copie 2"/><text:a xlink:type="simple" xlink:href="https://fedoramagazine.org/jsfx-on-fedora-linux-an-ultra-fast-audio-prototyping-engine/#reference_1" text:style-name="Internet_20_link" text:visited-style-name="Visited_20_Internet_20_Link">1</text:a>].</text:p>
        <text:p text:style-name="Text_20_body">Description:</text:p>
        <text:list text:style-name="L4">
          <text:list-item>
            <text:p text:style-name="P11"><text:span text:style-name="Strong_20_Emphasis">slider1</text:span>: create a user control (from 0 to 4 here); </text:p>
          </text:list-item>
          <text:list-item>
            <text:p text:style-name="P11"><text:span text:style-name="Strong_20_Emphasis">@init</text:span>: section executed during loading; </text:p>
          </text:list-item>
          <text:list-item>
            <text:p text:style-name="P11"><text:span text:style-name="Strong_20_Emphasis">@slider</text:span>: section executed when we move the slide; </text:p>
          </text:list-item>
          <text:list-item>
            <text:p text:style-name="P11"><text:span text:style-name="Strong_20_Emphasis">@sample:</text:span> section executed for each audio sample; </text:p>
          </text:list-item>
          <text:list-item>
            <text:p text:style-name="P11"><text:span text:style-name="Strong_20_Emphasis">spl0</text:span> and <text:span text:style-name="Strong_20_Emphasis">spl1</text:span>: left and right channels. </text:p>
          </text:list-item>
          <text:list-item>
            <text:p text:style-name="P12">In this example, we just multiply the input signal by a gain. </text:p>
          </text:list-item>
        </text:list>
        <text:p text:style-name="Text_20_body">Here is a view of the result :</text:p>
        <text:p text:style-name="Text_20_body"><draw:a xlink:type="simple" xlink:href="https://fedoramagazine.org/wp-content/uploads/2026/03/image-2.png"><draw:frame draw:style-name="fr2" draw:name="Image8" text:anchor-type="as-char" svg:width="17cm" svg:height="2.91cm" draw:z-index="2"><draw:image xlink:href="Pictures/10000001000002BC0000006C33B188B5.png" xlink:type="simple" xlink:show="embed" xlink:actuate="onLoad" draw:mime-type="image/png"/><svg:title>Screenshot of the simple gain example</svg:title></draw:frame></draw:a><text:s/></text:p>
        <text:h text:style-name="Heading_20_3" text:outline-level="3">An amplifier with a gain in dB</text:h>
        <text:p text:style-name="Text_20_body">This example will create a slider that will produce a gain in dB.</text:p>
        <text:p text:style-name="Preformatted_20_Text"><text:soft-page-break/>desc:Simple Amplifier (dB)</text:p>
        <text:p text:style-name="Preformatted_20_Text">slider1:0&lt;-60,24,0.1&gt;Gain (dB)</text:p>
        <text:p text:style-name="Preformatted_20_Text"/>
        <text:p text:style-name="Preformatted_20_Text">@init</text:p>
        <text:p text:style-name="Preformatted_20_Text">gain = 10^(slider1/20);</text:p>
        <text:p text:style-name="Preformatted_20_Text"/>
        <text:p text:style-name="Preformatted_20_Text">@slider</text:p>
        <text:p text:style-name="Preformatted_20_Text">gain = 10^(slider1/20);</text:p>
        <text:p text:style-name="Preformatted_20_Text"/>
        <text:p text:style-name="Preformatted_20_Text">@sample</text:p>
        <text:p text:style-name="Preformatted_20_Text">spl0 *= gain;</text:p>
        <text:p text:style-name="P6">spl1 *= gain;</text:p>
        <text:p text:style-name="Text_20_body">Only the way we compute the gain changes.</text:p>
        <text:p text:style-name="Text_20_body">Here is a view of the result :</text:p>
        <text:p text:style-name="Text_20_body"><draw:a xlink:type="simple" xlink:href="https://fedoramagazine.org/wp-content/uploads/2026/03/image-3.png"><draw:frame draw:style-name="fr2" draw:name="Image9" text:anchor-type="as-char" svg:width="17cm" svg:height="2.91cm" draw:z-index="3"><draw:image xlink:href="Pictures/10000001000002BC0000006C402B8829.png" xlink:type="simple" xlink:show="embed" xlink:actuate="onLoad" draw:mime-type="image/png"/><svg:title>Screenshot of the simple gain in dB example</svg:title></draw:frame></draw:a><text:s/></text:p>
        <text:h text:style-name="Heading_20_3" text:outline-level="3">An amplifier with an anti-clipping protection</text:h>
        <text:p text:style-name="Text_20_body">This example adds protection against clipping and uses a JSFX function for that.</text:p>
        <text:p text:style-name="Preformatted_20_Text">desc:Simple Amplifier with Soft Clip</text:p>
        <text:p text:style-name="Preformatted_20_Text">slider1:0&lt;-60,24,0.1&gt;Gain (dB)</text:p>
        <text:p text:style-name="Preformatted_20_Text"/>
        <text:p text:style-name="Preformatted_20_Text">@init</text:p>
        <text:p text:style-name="Preformatted_20_Text">gain = 10^(slider1/20);</text:p>
        <text:p text:style-name="Preformatted_20_Text"/>
        <text:p text:style-name="Preformatted_20_Text">@slider</text:p>
        <text:p text:style-name="Preformatted_20_Text">gain = 10^(slider1/20);</text:p>
        <text:p text:style-name="Preformatted_20_Text">function softclip(x) (</text:p>
        <text:p text:style-name="Preformatted_20_Text"><text:s text:c="2"/>x / (1 + abs(x));</text:p>
        <text:p text:style-name="Preformatted_20_Text">);</text:p>
        <text:p text:style-name="Preformatted_20_Text"/>
        <text:p text:style-name="Preformatted_20_Text">@sample</text:p>
        <text:p text:style-name="Preformatted_20_Text">spl0 = softclip(spl0 * gain);</text:p>
        <text:p text:style-name="P6">spl1 = softclip(spl1 * gain);</text:p>
        <text:p text:style-name="Text_20_body">Here is a view of the result :</text:p>
        <text:p text:style-name="Text_20_body"><draw:a xlink:type="simple" xlink:href="https://fedoramagazine.org/wp-content/uploads/2026/03/image-4.png"><draw:frame draw:style-name="fr2" draw:name="Image10" text:anchor-type="as-char" svg:width="17cm" svg:height="2.91cm" draw:z-index="4"><draw:image xlink:href="Pictures/10000001000002BC0000006C8E314663.png" xlink:type="simple" xlink:show="embed" xlink:actuate="onLoad" draw:mime-type="image/png"/><svg:title>Screenshot of the simple gain in dB with. a soft clip example</svg:title></draw:frame></draw:a><text:s/></text:p>
        <text:h text:style-name="Heading_20_3" text:outline-level="3">An amplifier with a VU meter</text:h>
        <text:p text:style-name="Text_20_body">This example is the same as the one above, we just add a printed value of the gain.</text:p>
        <text:p text:style-name="Preformatted_20_Text">desc:Simple Amplifier with VU Meter</text:p>
        <text:p text:style-name="Preformatted_20_Text">slider1:0&lt;-60,24,0.1&gt;Gain (dB)</text:p>
        <text:p text:style-name="Preformatted_20_Text"><text:soft-page-break/></text:p>
        <text:p text:style-name="Preformatted_20_Text">@init</text:p>
        <text:p text:style-name="Preformatted_20_Text">rms = 0;</text:p>
        <text:p text:style-name="Preformatted_20_Text">coeff = 0.999; // RMS smoothing</text:p>
        <text:p text:style-name="Preformatted_20_Text">gain = 10^(slider1/20);</text:p>
        <text:p text:style-name="Preformatted_20_Text"/>
        <text:p text:style-name="Preformatted_20_Text">@slider</text:p>
        <text:p text:style-name="Preformatted_20_Text">gain = 10^(slider1/20);</text:p>
        <text:p text:style-name="Preformatted_20_Text"/>
        <text:p text:style-name="Preformatted_20_Text">@sample</text:p>
        <text:p text:style-name="Preformatted_20_Text">// Apply the gain</text:p>
        <text:p text:style-name="Preformatted_20_Text">spl0 *= gain;</text:p>
        <text:p text:style-name="Preformatted_20_Text">spl1 *= gain;</text:p>
        <text:p text:style-name="Preformatted_20_Text">// Compute RMS (mean value of the 2 channels)</text:p>
        <text:p text:style-name="Preformatted_20_Text">mono = 0.5*(spl0 + spl1);</text:p>
        <text:p text:style-name="Preformatted_20_Text">rms = sqrt((coeff * rms * rms) + ((1 - coeff) * mono * mono));</text:p>
        <text:p text:style-name="Preformatted_20_Text"/>
        <text:p text:style-name="Preformatted_20_Text">@gfx 300 200 // UI part</text:p>
        <text:p text:style-name="Preformatted_20_Text">gfx_r = 0.1; gfx_g = 0.1; gfx_b = 0.1;</text:p>
        <text:p text:style-name="Preformatted_20_Text">gfx_rect(0, 0, gfx_w, gfx_h);</text:p>
        <text:p text:style-name="Preformatted_20_Text"/>
        <text:p text:style-name="Preformatted_20_Text">// Convert to dB</text:p>
        <text:p text:style-name="Preformatted_20_Text">rms_db = 20*log(rms)/log(10);</text:p>
        <text:p text:style-name="Preformatted_20_Text">rms_db &lt; -60 ? rms_db = -60;</text:p>
        <text:p text:style-name="Preformatted_20_Text"/>
        <text:p text:style-name="Preformatted_20_Text">// Normalisation for the display</text:p>
        <text:p text:style-name="Preformatted_20_Text">meter = (rms_db + 60) / 60;</text:p>
        <text:p text:style-name="Preformatted_20_Text">meter &gt; 1 ? meter = 1;</text:p>
        <text:p text:style-name="Preformatted_20_Text"/>
        <text:p text:style-name="Preformatted_20_Text">// Green color</text:p>
        <text:p text:style-name="Preformatted_20_Text">gfx_r = 0;</text:p>
        <text:p text:style-name="Preformatted_20_Text">gfx_g = 1;</text:p>
        <text:p text:style-name="Preformatted_20_Text">gfx_b = 0;</text:p>
        <text:p text:style-name="Preformatted_20_Text"/>
        <text:p text:style-name="Preformatted_20_Text">// Horizontal bar</text:p>
        <text:p text:style-name="Preformatted_20_Text">gfx_rect(10, gfx_h/2 - 10, meter*(gfx_w-20), 20);</text:p>
        <text:p text:style-name="Preformatted_20_Text"/>
        <text:p text:style-name="Preformatted_20_Text">// Text</text:p>
        <text:p text:style-name="Preformatted_20_Text">gfx_r = gfx_g = gfx_b = 1;</text:p>
        <text:p text:style-name="Preformatted_20_Text">gfx_x = 10;</text:p>
        <text:p text:style-name="Preformatted_20_Text">gfx_y = gfx_h/2 + 20;</text:p>
        <text:p text:style-name="P6">gfx_printf("Level: %.1f dB", rms_db);</text:p>
        <text:p text:style-name="Text_20_body">The global structure of the code:</text:p>
        <text:list text:style-name="L5">
          <text:list-item>
            <text:p text:style-name="P13">Apply the gain </text:p>
          </text:list-item>
          <text:list-item>
            <text:p text:style-name="P13">Compute a smoothed RMS value </text:p>
          </text:list-item>
          <text:list-item>
            <text:p text:style-name="P13">Convert to dB </text:p>
          </text:list-item>
          <text:list-item>
            <text:p text:style-name="P13">Display a horizontal bar </text:p>
          </text:list-item>
          <text:list-item>
            <text:p text:style-name="P14">Display a numerical value </text:p>
          </text:list-item>
        </text:list>
        <text:p text:style-name="Text_20_body">Here is a view of the result :</text:p>
        <text:p text:style-name="Text_20_body"><text:soft-page-break/><draw:a xlink:type="simple" xlink:href="https://fedoramagazine.org/wp-content/uploads/2026/03/image-5.png"><draw:frame draw:style-name="fr2" draw:name="Image11" text:anchor-type="as-char" svg:width="17cm" svg:height="4.42cm" draw:z-index="5"><draw:image xlink:href="Pictures/10000001000002BC000000A5945BF641.png" xlink:type="simple" xlink:show="embed" xlink:actuate="onLoad" draw:mime-type="image/png"/><svg:title>Screenshot of the simple example with a VU meter</svg:title></draw:frame></draw:a><text:s/></text:p>
        <text:h text:style-name="Heading_20_3" text:outline-level="3">An amplifier using the UI lib from jsfx-ui-lib</text:h>
        <text:p text:style-name="Text_20_body">In this example, we will use a JSFX UI library to produce a better representation of the amplifier’s elements.</text:p>
        <text:p text:style-name="Text_20_body">First, clone the <text:a xlink:type="simple" xlink:href="https://github.com/geraintluff/jsfx-ui-lib" office:target-frame-name="_blank" xlink:show="new" text:style-name="Internet_20_link" text:visited-style-name="Visited_20_Internet_20_Link">https://github.com/geraintluff/jsfx-ui-lib</text:a> repository and copy the file <text:span text:style-name="Strong_20_Emphasis">ui-lib.jsfx-inc</text:span> into the directory where your JSFX files are saved.</text:p>
        <text:p text:style-name="Preformatted_20_Text">desc:Simple Amplifier with UI Lib VU</text:p>
        <text:p text:style-name="Preformatted_20_Text">import ui-lib.jsfx-inc</text:p>
        <text:p text:style-name="Preformatted_20_Text">slider1:0&lt;-60,24,0.1&gt;Gain (dB)</text:p>
        <text:p text:style-name="Preformatted_20_Text"/>
        <text:p text:style-name="Preformatted_20_Text">@init</text:p>
        <text:p text:style-name="Preformatted_20_Text">freemem = ui_setup(0);</text:p>
        <text:p text:style-name="Preformatted_20_Text">rms = 0;</text:p>
        <text:p text:style-name="Preformatted_20_Text">coeff = 0.999;</text:p>
        <text:p text:style-name="Preformatted_20_Text">gfx_rate = 30; // 30 FPS</text:p>
        <text:p text:style-name="Preformatted_20_Text"/>
        <text:p text:style-name="Preformatted_20_Text">@slider</text:p>
        <text:p text:style-name="Preformatted_20_Text">gain = 10^(slider1/20);</text:p>
        <text:p text:style-name="Preformatted_20_Text"/>
        <text:p text:style-name="Preformatted_20_Text">@sample</text:p>
        <text:p text:style-name="Preformatted_20_Text">spl0 *= gain;</text:p>
        <text:p text:style-name="Preformatted_20_Text">spl1 *= gain;</text:p>
        <text:p text:style-name="Preformatted_20_Text">mono = 0.5*(spl0 + spl1);</text:p>
        <text:p text:style-name="Preformatted_20_Text">rms = sqrt(coeff*rms*rms + (1-coeff)*mono*mono);</text:p>
        <text:p text:style-name="Preformatted_20_Text"/>
        <text:p text:style-name="Preformatted_20_Text">// ---- RMS computation ----</text:p>
        <text:p text:style-name="Preformatted_20_Text">level_db = 20*log(rms)/log(10);</text:p>
        <text:p text:style-name="Preformatted_20_Text">level_db &lt; -60 ? level_db = -60;</text:p>
        <text:p text:style-name="Preformatted_20_Text"/>
        <text:p text:style-name="Preformatted_20_Text">@gfx 300 200</text:p>
        <text:p text:style-name="Preformatted_20_Text">ui_start("main");</text:p>
        <text:p text:style-name="Preformatted_20_Text"/>
        <text:p text:style-name="Preformatted_20_Text">// ---- Gain ----</text:p>
        <text:p text:style-name="Preformatted_20_Text">control_start("main","default");</text:p>
        <text:p text:style-name="Preformatted_20_Text">control_dial(slider1, 0, 1, 0);</text:p>
        <text:p text:style-name="Preformatted_20_Text">cut = (level_db + 100) / 200 * (ui_right() - ui_left()) + ui_left();</text:p>
        <text:p text:style-name="Preformatted_20_Text"/>
        <text:p text:style-name="Preformatted_20_Text">// ---- VU ----</text:p>
        <text:p text:style-name="Preformatted_20_Text">ui_split_bottom(50);</text:p>
        <text:p text:style-name="Preformatted_20_Text">ui_color(0, 0, 0);</text:p>
        <text:p text:style-name="Preformatted_20_Text">ui_text("RMS Level: ");</text:p>
        <text:p text:style-name="Preformatted_20_Text">gfx_printf("%d", level_db);</text:p>
        <text:p text:style-name="Preformatted_20_Text">ui_split_bottom(10);</text:p>
        <text:p text:style-name="Preformatted_20_Text">uix_setgfxcolorrgba(0, 255, 0, 1);</text:p>
        <text:p text:style-name="Preformatted_20_Text">gfx_rect(ui_left(), ui_top(), ui_right() - ui_left(), ui_bottom() - ui_top());</text:p>
        <text:p text:style-name="Preformatted_20_Text">uix_setgfxcolorrgba(255, 0, 0, 1);</text:p>
        <text:p text:style-name="Preformatted_20_Text">gfx_rect(ui_left(), ui_top(), cut, ui_bottom() - ui_top());</text:p>
        <text:p text:style-name="P6">ui_pop();</text:p>
        <text:p text:style-name="Text_20_body"><text:soft-page-break/>The global structure of the example:</text:p>
        <text:list text:style-name="L6">
          <text:list-item>
            <text:p text:style-name="P15">Import and setup: The UI library is imported and then allocated memory (ui_setup) using @init; </text:p>
          </text:list-item>
          <text:list-item>
            <text:p text:style-name="P15">UI controls: control_dial creates a thematic potentiometer with a label, integrated into the library; </text:p>
          </text:list-item>
          <text:list-item>
            <text:p text:style-name="P15">Integrated VU meter: A small graph is drawn with ui_graph, normalizing the RMS value between 0 and 1; </text:p>
          </text:list-item>
          <text:list-item>
            <text:p text:style-name="P16">UI structure: ui_start(“main”) prepares the interface for each frame. ui_push_height / ui_pop organize the vertical space. </text:p>
          </text:list-item>
        </text:list>
        <text:p text:style-name="Text_20_body">Here is a view of the result :</text:p>
        <text:p text:style-name="Text_20_body"><draw:a xlink:type="simple" xlink:href="https://fedoramagazine.org/wp-content/uploads/2026/03/image-6.png"><draw:frame draw:style-name="fr2" draw:name="Image12" text:anchor-type="as-char" svg:width="17cm" svg:height="8.07cm" draw:z-index="6"><draw:image xlink:href="Pictures/10000001000002BC0000012FB78CFBDD.png" xlink:type="simple" xlink:show="embed" xlink:actuate="onLoad" draw:mime-type="image/png"/><svg:title>Screenshot of the simple example with JSFX graphic elements</svg:title></draw:frame></draw:a><text:s/></text:p>
        <text:h text:style-name="Heading_20_3" text:outline-level="3">A simple synthesizer</text:h>
        <text:p text:style-name="Text_20_body">Now, produce some sound and use MIDI for that.</text:p>
        <text:p text:style-name="P3">The core of this example will be the ADSR envelope generator ([<text:bookmark text:name="#reference_10"/><text:a xlink:type="simple" xlink:href="https://fedoramagazine.org/jsfx-on-fedora-linux-an-ultra-fast-audio-prototyping-engine/#reference_10" text:style-name="Internet_20_link" text:visited-style-name="Visited_20_Internet_20_Link">10</text:a>]).</text:p>
        <text:p text:style-name="Preformatted_20_Text">desc:Simple MIDI Synth (Mono Sine)</text:p>
        <text:p text:style-name="Preformatted_20_Text">// Parameters</text:p>
        <text:p text:style-name="Preformatted_20_Text">slider1:0.01&lt;0.001,2,0.001&gt;Attack (s)</text:p>
        <text:p text:style-name="Preformatted_20_Text">slider2:0.2&lt;0.001,2,0.001&gt;Decay (s)</text:p>
        <text:p text:style-name="Preformatted_20_Text">slider3:0.8&lt;0,1,0.01&gt;Sustain</text:p>
        <text:p text:style-name="Preformatted_20_Text">slider4:0.5&lt;0.001,3,0.001&gt;Release (s)</text:p>
        <text:p text:style-name="Preformatted_20_Text">slider5:0.5&lt;0,1,0.01&gt;Volume</text:p>
        <text:p text:style-name="Preformatted_20_Text"/>
        <text:p text:style-name="Preformatted_20_Text">@init</text:p>
        <text:p text:style-name="Preformatted_20_Text">phase = 0;</text:p>
        <text:p text:style-name="Preformatted_20_Text">note_on = 0;</text:p>
        <text:p text:style-name="Preformatted_20_Text">env = 0;</text:p>
        <text:p text:style-name="Preformatted_20_Text">state = 0; // 0=idle,1=attack,2=decay,3=sustain,4=release</text:p>
        <text:p text:style-name="Preformatted_20_Text"/>
        <text:p text:style-name="Preformatted_20_Text">@slider</text:p>
        <text:p text:style-name="Preformatted_20_Text">// Compute the increment / decrement for each states</text:p>
        <text:p text:style-name="Preformatted_20_Text">attack_inc = 1/(slider1*srate);</text:p>
        <text:p text:style-name="Preformatted_20_Text">decay_dec = (1-slider3)/(slider2*srate);</text:p>
        <text:p text:style-name="Preformatted_20_Text">release_dec = slider3/(slider4*srate);</text:p>
        <text:p text:style-name="Preformatted_20_Text"/>
        <text:p text:style-name="Preformatted_20_Text"><text:soft-page-break/>@block</text:p>
        <text:p text:style-name="Preformatted_20_Text">while (</text:p>
        <text:p text:style-name="Preformatted_20_Text"><text:s text:c="2"/>midirecv(offset, msg1, msg23) ? (</text:p>
        <text:p text:style-name="Preformatted_20_Text"><text:s text:c="4"/>status = msg1 &amp; 240;</text:p>
        <text:p text:style-name="Preformatted_20_Text"><text:s text:c="4"/>note = msg23 &amp; 127;</text:p>
        <text:p text:style-name="Preformatted_20_Text"><text:s text:c="4"/>vel = (msg23/256)|0;</text:p>
        <text:p text:style-name="Preformatted_20_Text"><text:s text:c="4"/>// Note On</text:p>
        <text:p text:style-name="Preformatted_20_Text"><text:s text:c="4"/>status == 144 &amp;&amp; vel &gt; 0 ? (</text:p>
        <text:p text:style-name="Preformatted_20_Text"><text:s text:c="6"/>freq = 440 * 2^((note-69)/12);</text:p>
        <text:p text:style-name="Preformatted_20_Text"><text:s text:c="6"/>phase_inc = 2*$pi*freq/srate;</text:p>
        <text:p text:style-name="Preformatted_20_Text"><text:s text:c="6"/>note_on = 1;</text:p>
        <text:p text:style-name="Preformatted_20_Text"><text:s text:c="6"/>state = 1;</text:p>
        <text:p text:style-name="Preformatted_20_Text"><text:s text:c="4"/>);</text:p>
        <text:p text:style-name="Preformatted_20_Text"><text:s text:c="4"/>// Note Off</text:p>
        <text:p text:style-name="Preformatted_20_Text"><text:s text:c="4"/>(status == 128) || (status == 144 &amp;&amp; vel == 0) ? (</text:p>
        <text:p text:style-name="Preformatted_20_Text"><text:s text:c="6"/>state = 4;</text:p>
        <text:p text:style-name="Preformatted_20_Text"><text:s text:c="4"/>);</text:p>
        <text:p text:style-name="Preformatted_20_Text"><text:s text:c="2"/>);</text:p>
        <text:p text:style-name="Preformatted_20_Text">);</text:p>
        <text:p text:style-name="Preformatted_20_Text"/>
        <text:p text:style-name="Preformatted_20_Text">@sample</text:p>
        <text:p text:style-name="P17">// ADSR Envelope [<text:bookmark text:name="#reference_10 Copie 1"/><text:a xlink:type="simple" xlink:href="https://fedoramagazine.org/jsfx-on-fedora-linux-an-ultra-fast-audio-prototyping-engine/#reference_10" text:style-name="Internet_20_link" text:visited-style-name="Visited_20_Internet_20_Link">10</text:a>]</text:p>
        <text:p text:style-name="Preformatted_20_Text">state == 1 ? ( // Attack</text:p>
        <text:p text:style-name="Preformatted_20_Text"><text:s text:c="2"/>env += attack_inc;</text:p>
        <text:p text:style-name="Preformatted_20_Text"><text:s text:c="2"/>env &gt;= 1 ? (</text:p>
        <text:p text:style-name="Preformatted_20_Text"><text:s text:c="4"/>env = 1;</text:p>
        <text:p text:style-name="Preformatted_20_Text"><text:s text:c="4"/>state = 2;</text:p>
        <text:p text:style-name="Preformatted_20_Text"><text:s text:c="2"/>);</text:p>
        <text:p text:style-name="Preformatted_20_Text">);</text:p>
        <text:p text:style-name="Preformatted_20_Text"/>
        <text:p text:style-name="Preformatted_20_Text">state == 2 ? ( // Decay</text:p>
        <text:p text:style-name="Preformatted_20_Text"><text:s text:c="2"/>env -= decay_dec;</text:p>
        <text:p text:style-name="Preformatted_20_Text"><text:s text:c="2"/>env &lt;= slider3 ? (</text:p>
        <text:p text:style-name="Preformatted_20_Text"><text:s text:c="4"/>env = slider3;</text:p>
        <text:p text:style-name="Preformatted_20_Text"><text:s text:c="4"/>state = 3;</text:p>
        <text:p text:style-name="Preformatted_20_Text"><text:s text:c="2"/>);</text:p>
        <text:p text:style-name="Preformatted_20_Text">);</text:p>
        <text:p text:style-name="Preformatted_20_Text"/>
        <text:p text:style-name="Preformatted_20_Text">state == 3 ? ( // Sustain</text:p>
        <text:p text:style-name="Preformatted_20_Text"><text:s text:c="2"/>env = slider3;</text:p>
        <text:p text:style-name="Preformatted_20_Text">);</text:p>
        <text:p text:style-name="Preformatted_20_Text"/>
        <text:p text:style-name="Preformatted_20_Text">state == 4 ? ( // Release</text:p>
        <text:p text:style-name="Preformatted_20_Text"><text:s text:c="2"/>env -= release_dec;</text:p>
        <text:p text:style-name="Preformatted_20_Text"><text:s text:c="2"/>env &lt;= 0 ? (</text:p>
        <text:p text:style-name="Preformatted_20_Text"><text:s text:c="4"/>env = 0;</text:p>
        <text:p text:style-name="Preformatted_20_Text"><text:s text:c="4"/>state = 0;</text:p>
        <text:p text:style-name="Preformatted_20_Text"><text:s text:c="2"/>);</text:p>
        <text:p text:style-name="Preformatted_20_Text">);</text:p>
        <text:p text:style-name="Preformatted_20_Text"/>
        <text:p text:style-name="Preformatted_20_Text">// Sine oscillator</text:p>
        <text:p text:style-name="Preformatted_20_Text">sample = sin(phase) * env * slider5;</text:p>
        <text:p text:style-name="Preformatted_20_Text">phase += phase_inc;</text:p>
        <text:p text:style-name="Preformatted_20_Text">phase &gt; 2*$pi ? phase -= 2*$pi;</text:p>
        <text:p text:style-name="Preformatted_20_Text"/>
        <text:p text:style-name="Preformatted_20_Text">// Stereo output</text:p>
        <text:p text:style-name="Preformatted_20_Text">spl0 = sample;</text:p>
        <text:p text:style-name="P6">spl1 = sample;</text:p>
        <text:p text:style-name="Text_20_body">Global structure of the example:</text:p>
        <text:list text:style-name="L7">
          <text:list-item>
            <text:p text:style-name="P18">Receives MIDI via <text:span text:style-name="Strong_20_Emphasis">@block</text:span>; </text:p>
          </text:list-item>
          <text:list-item>
            <text:p text:style-name="P18">Converts MIDI note to frequency (A440 standard); </text:p>
          </text:list-item>
          <text:list-item>
            <text:p text:style-name="P18"><text:soft-page-break/>Generates a sine wave; </text:p>
          </text:list-item>
          <text:list-item>
            <text:p text:style-name="P18">Applies an ADSR envelope; </text:p>
          </text:list-item>
          <text:list-item>
            <text:p text:style-name="P19">Outputs in stereo. </text:p>
          </text:list-item>
        </text:list>
        <text:p text:style-name="Text_20_body">Here is a view of the result :</text:p>
        <text:p text:style-name="Text_20_body"><draw:a xlink:type="simple" xlink:href="https://fedoramagazine.org/wp-content/uploads/2026/03/image-7.png"><draw:frame draw:style-name="fr2" draw:name="Image13" text:anchor-type="as-char" svg:width="17cm" svg:height="6.75cm" draw:z-index="7"><draw:image xlink:href="Pictures/100000010000031D000000FD7887FD57.png" xlink:type="simple" xlink:show="embed" xlink:actuate="onLoad" draw:mime-type="image/png"/><svg:title>Screenshot of the synthesizer example</svg:title></draw:frame></draw:a><text:s/></text:p>
        <text:h text:style-name="Heading_20_2" text:outline-level="2">Comparison with CLAP / VST3</text:h>
        <text:h text:style-name="Heading_20_3" text:outline-level="3">JSFX + YSFX</text:h>
        <text:p text:style-name="Text_20_body">Advantages of JSFX:</text:p>
        <text:list text:style-name="L8">
          <text:list-item>
            <text:p text:style-name="P20">No compilation required; </text:p>
          </text:list-item>
          <text:list-item>
            <text:p text:style-name="P20">Instant reloading; </text:p>
          </text:list-item>
          <text:list-item>
            <text:p text:style-name="P20">Fast learning curve; </text:p>
          </text:list-item>
          <text:list-item>
            <text:p text:style-name="P20">Ideal for DSP prototyping; </text:p>
          </text:list-item>
          <text:list-item>
            <text:p text:style-name="P21">Portable between systems via YSFX. </text:p>
          </text:list-item>
        </text:list>
        <text:p text:style-name="Text_20_body">Limitations:</text:p>
        <text:list text:style-name="L9">
          <text:list-item>
            <text:p text:style-name="P22">Less performant than native C++ for heavy processing; </text:p>
          </text:list-item>
          <text:list-item>
            <text:p text:style-name="P22">Less suitable for “industrial” distribution; </text:p>
          </text:list-item>
          <text:list-item>
            <text:p text:style-name="P23">Simpler API, therefore less low-level control. </text:p>
          </text:list-item>
        </text:list>
        <text:h text:style-name="Heading_20_3" text:outline-level="3">CLAP / VST3 in C/C++</text:h>
        <text:p text:style-name="Text_20_body">Advantages:</text:p>
        <text:list text:style-name="L10">
          <text:list-item>
            <text:p text:style-name="P24">Maximum performance; </text:p>
          </text:list-item>
          <text:list-item>
            <text:p text:style-name="P24">Fine-grained control over the architecture; </text:p>
          </text:list-item>
          <text:list-item>
            <text:p text:style-name="P24">Deep integration with the Linux audio ecosystem; </text:p>
          </text:list-item>
          <text:list-item>
            <text:p text:style-name="P25">Standardized distribution. </text:p>
          </text:list-item>
        </text:list>
        <text:p text:style-name="Text_20_body">Limitations:</text:p>
        <text:list text:style-name="L11">
          <text:list-item>
            <text:p text:style-name="P26">Requires a complete toolchain; </text:p>
          </text:list-item>
          <text:list-item>
            <text:p text:style-name="P26">ABI management/compilation; </text:p>
          </text:list-item>
          <text:list-item>
            <text:p text:style-name="P27">Longer development cycle. </text:p>
          </text:list-item>
        </text:list>
        <text:h text:style-name="Heading_20_2" text:outline-level="2"><text:soft-page-break/>Conclusion</text:h>
        <text:p text:style-name="Text_20_body">A functional audio effect can be written in just a few lines, adding a simple graphical interface, and then loaded this script as an CLAP / VST3 plugin on Fedora Linux. This requires no compilation, no complex SDK, no cumbersome toolchain.</text:p>
        <text:p text:style-name="Text_20_body">JSFX scripts don’t replace native C++ development when it comes to producing optimized, widely distributable plugins. However, they offer an exceptional environment for experimentation, learning signal processing, and rapid prototyping.</text:p>
        <text:p text:style-name="Text_20_body">Thanks to YSFX, JSFX scripts now integrate seamlessly into the Linux audio ecosystem, alongside Carla, Ardour, and a PipeWire-based audio system.</text:p>
        <text:p text:style-name="Text_20_body">For developers and curious musicians alike, JSFX provides a simple and immediate entry point into creating real-time audio effects on Fedora Linux.</text:p>
        <text:h text:style-name="Heading_20_2" text:outline-level="2">Available plugins</text:h>
        <text:h text:style-name="Heading_20_3" text:outline-level="3">ysfx-chokehold</text:h>
        <text:p text:style-name="Text_20_body">A free collection of JS (JesuSonic) plugins for Reaper.</text:p>
        <text:p text:style-name="Text_20_body">Code available at: <text:a xlink:type="simple" xlink:href="https://github.com/chkhld/jsfx" text:style-name="Internet_20_link" text:visited-style-name="Visited_20_Internet_20_Link">https://github.com/chkhld/jsfx</text:a></text:p>
        <text:p text:style-name="Text_20_body">To install this set of YSFX plugins:</text:p>
        <text:p text:style-name="P6">$ dnf install ysfx-chokehold</text:p>
        <text:p text:style-name="Text_20_body">YSFX plugins will be available at /usr/share/ysfx-chokehold.</text:p>
        <text:h text:style-name="Heading_20_3" text:outline-level="3">ysfx-geraintluff</text:h>
        <text:p text:style-name="Text_20_body">Collection of JSFX effects.</text:p>
        <text:p text:style-name="Text_20_body">Code available at: <text:a xlink:type="simple" xlink:href="https://github.com/geraintluff/jsfx" office:target-frame-name="_blank" xlink:show="new" text:style-name="Internet_20_link" text:visited-style-name="Visited_20_Internet_20_Link">https://github.com/geraintluff/jsfx</text:a></text:p>
        <text:p text:style-name="Text_20_body">To install this set of YSFX plugins:</text:p>
        <text:p text:style-name="P6">$ dnf install ysfx-geraintluff</text:p>
        <text:p text:style-name="Text_20_body">YSFX plugins will be available at /usr/share/ysfx-geraintluff.</text:p>
        <text:h text:style-name="Heading_20_3" text:outline-level="3">ysfx-jesusonic</text:h>
        <text:p text:style-name="Text_20_body">Some JSFX effects from Cockos.</text:p>
        <text:p text:style-name="Text_20_body">Code available at: <text:a xlink:type="simple" xlink:href="https://www.cockos.com/jsfx" office:target-frame-name="_blank" xlink:show="new" text:style-name="Internet_20_link" text:visited-style-name="Visited_20_Internet_20_Link">https://www.cockos.com/jsfx</text:a></text:p>
        <text:p text:style-name="Text_20_body">To install this set of YSFX plugins:</text:p>
        <text:p text:style-name="P6">$ dnf install ysfx-jesusonic</text:p>
        <text:p text:style-name="Text_20_body">YSFX plugins will be available at /usr/share/ysfx-jesusonic.</text:p>
        <text:h text:style-name="Heading_20_3" text:outline-level="3"><text:soft-page-break/>ysfx-joepvanlier</text:h>
        <text:p text:style-name="Text_20_body">A bundle of JSFX and scripts for reaper.</text:p>
        <text:p text:style-name="Text_20_body">Code available at: <text:a xlink:type="simple" xlink:href="https://github.com/JoepVanlier/JSFX" office:target-frame-name="_blank" xlink:show="new" text:style-name="Internet_20_link" text:visited-style-name="Visited_20_Internet_20_Link">https://github.com/JoepVanlier/JSFX</text:a></text:p>
        <text:p text:style-name="Text_20_body">To install this set of YSFX plugins:</text:p>
        <text:p text:style-name="P6">$ dnf install ysfx-joepvanlier</text:p>
        <text:p text:style-name="Text_20_body">YSFX plugins will be available at /usr/share/ysfx-joepvanlier.</text:p>
        <text:h text:style-name="Heading_20_3" text:outline-level="3">ysfx-lms</text:h>
        <text:p text:style-name="Text_20_body">LMS Plugin Suite – Open source JSFX audio plugins</text:p>
        <text:p text:style-name="Text_20_body">Code available at: <text:a xlink:type="simple" xlink:href="https://github.com/LMSBAND/LMS" office:target-frame-name="_blank" xlink:show="new" text:style-name="Internet_20_link" text:visited-style-name="Visited_20_Internet_20_Link">https://github.com/LMSBAND/LMS</text:a></text:p>
        <text:p text:style-name="Text_20_body">To install this set of YSFX plugins:</text:p>
        <text:p text:style-name="P6">$ dnf install ysfx-lms</text:p>
        <text:p text:style-name="Text_20_body">YSFX plugins will be available at /usr/share/ysfx-lms.</text:p>
        <text:h text:style-name="Heading_20_3" text:outline-level="3">ysfx-reateam</text:h>
        <text:p text:style-name="Text_20_body">Community-maintained collection of JS effects for REAPER</text:p>
        <text:p text:style-name="Text_20_body">Code available at: <text:a xlink:type="simple" xlink:href="https://github.com/ReaTeam/JSFX" office:target-frame-name="_blank" xlink:show="new" text:style-name="Internet_20_link" text:visited-style-name="Visited_20_Internet_20_Link">https://github.com/ReaTeam/JSFX</text:a></text:p>
        <text:p text:style-name="Text_20_body">To install this set of YSFX plugins:</text:p>
        <text:p text:style-name="P6">$ dnf install ysfx-reateam</text:p>
        <text:p text:style-name="Text_20_body">YSFX plugins will be available at /usr/share/ysfx-reateam.</text:p>
        <text:h text:style-name="Heading_20_3" text:outline-level="3">ysfx-rejj</text:h>
        <text:p text:style-name="Text_20_body">Reaper JSFX Plugins.</text:p>
        <text:p text:style-name="Text_20_body">Code available at: <text:a xlink:type="simple" xlink:href="https://github.com/Justin-Johnson/ReJJ" office:target-frame-name="_blank" xlink:show="new" text:style-name="Internet_20_link" text:visited-style-name="Visited_20_Internet_20_Link">https://github.com/Justin-Johnson/ReJJ</text:a></text:p>
        <text:p text:style-name="Text_20_body">To install this set of YSFX plugins:</text:p>
        <text:p text:style-name="P6">$ dnf install ysfx-rejj</text:p>
        <text:p text:style-name="Text_20_body">And all the YSFX plugins will be available at /usr/share/ysfx-rejj.</text:p>
        <text:h text:style-name="Heading_20_3" text:outline-level="3">ysfx-sonic-anomaly</text:h>
        <text:p text:style-name="Text_20_body">Sonic Anomaly JSFX scripts for Reaper</text:p>
        <text:p text:style-name="Text_20_body">Code available at: <text:a xlink:type="simple" xlink:href="https://github.com/Sonic-Anomaly/Sonic-Anomaly-JSFX" office:target-frame-name="_blank" xlink:show="new" text:style-name="Internet_20_link" text:visited-style-name="Visited_20_Internet_20_Link">https://github.com/Sonic-Anomaly/Sonic-Anomaly-JSFX</text:a></text:p>
        <text:p text:style-name="Text_20_body">To install this set of YSFX plugins:</text:p>
        <text:p text:style-name="P6">$ dnf install ysfx-sonic-anomaly</text:p>
        <text:p text:style-name="Text_20_body">YSFX plugins will be available at /usr/share/ysfx-sonic-anomaly.</text:p>
        <text:h text:style-name="Heading_20_3" text:outline-level="3"><text:soft-page-break/>ysfx-tilr</text:h>
        <text:p text:style-name="Text_20_body">TiagoLR collection of JSFX effects</text:p>
        <text:p text:style-name="Text_20_body">Code available at: <text:a xlink:type="simple" xlink:href="https://github.com/tiagolr/tilr_jsfx" office:target-frame-name="_blank" xlink:show="new" text:style-name="Internet_20_link" text:visited-style-name="Visited_20_Internet_20_Link">https://github.com/tiagolr/tilr_jsfx</text:a></text:p>
        <text:p text:style-name="Text_20_body">To install this set of YSFX plugins:</text:p>
        <text:p text:style-name="P6">$ dnf install ysfx-tilr</text:p>
        <text:p text:style-name="Text_20_body">YSFX plugins will be available at /usr/share/ysfx-tilr.</text:p>
        <text:h text:style-name="Heading_20_3" text:outline-level="3">ysfx-tukan-studio</text:h>
        <text:p text:style-name="Text_20_body">JSFX Plugins for Reaper</text:p>
        <text:p text:style-name="Text_20_body">Code available at: <text:a xlink:type="simple" xlink:href="https://github.com/TukanStudios/TUKAN_STUDIOS_PLUGINS" office:target-frame-name="_blank" xlink:show="new" text:style-name="Internet_20_link" text:visited-style-name="Visited_20_Internet_20_Link">https://github.com/TukanStudios/TUKAN_STUDIOS_PLUGINS</text:a></text:p>
        <text:p text:style-name="Text_20_body">To install this set of YSFX plugins:</text:p>
        <text:p text:style-name="P6">$ dnf install ysfx-tukan-studio</text:p>
        <text:p text:style-name="Text_20_body">YSFX plugins will be available at /usr/share/ysfx-tukan-studio.</text:p>
        <text:h text:style-name="Heading_20_2" text:outline-level="2">Webography</text:h>
        <text:p text:style-name="P3"><text:bookmark text:name="reference_1"/>[1] – <text:a xlink:type="simple" xlink:href="https://www.cockos.com/jsfx" office:target-frame-name="_blank" xlink:show="new" text:style-name="Internet_20_link" text:visited-style-name="Visited_20_Internet_20_Link">https://www.cockos.com/jsfx</text:a></text:p>
        <text:p text:style-name="P3"><text:bookmark text:name="reference_2"/>[2] – <text:a xlink:type="simple" xlink:href="https://github.com/geraintluff/jsfx" office:target-frame-name="_blank" xlink:show="new" text:style-name="Internet_20_link" text:visited-style-name="Visited_20_Internet_20_Link">https://github.com/geraintluff/jsfx</text:a></text:p>
        <text:p text:style-name="P3"><text:bookmark text:name="reference_3"/>[3] – <text:a xlink:type="simple" xlink:href="https://github.com/JoepVanlier/ysfx" text:style-name="Internet_20_link" text:visited-style-name="Visited_20_Internet_20_Link">https://github.com/JoepVanlier/ysfx</text:a></text:p>
        <text:p text:style-name="P3"><text:bookmark text:name="reference_4"/>[4] – <text:a xlink:type="simple" xlink:href="https://www.reaper.fm/sdk/js/js.php" office:target-frame-name="_blank" xlink:show="new" text:style-name="Internet_20_link" text:visited-style-name="Visited_20_Internet_20_Link">https://www.reaper.fm/sdk/js/js.php</text:a></text:p>
        <text:p text:style-name="P3"><text:bookmark text:name="reference_5"/>[5] – <text:a xlink:type="simple" xlink:href="https://audinux.github.io/" text:style-name="Internet_20_link" text:visited-style-name="Visited_20_Internet_20_Link">https://aud</text:a><text:a xlink:type="simple" xlink:href="https://audinux.github.io/" office:target-frame-name="_blank" xlink:show="new" text:style-name="Internet_20_link" text:visited-style-name="Visited_20_Internet_20_Link">i</text:a><text:a xlink:type="simple" xlink:href="https://audinux.github.io/" text:style-name="Internet_20_link" text:visited-style-name="Visited_20_Internet_20_Link">nux.github.io</text:a></text:p>
        <text:p text:style-name="P3"><text:bookmark text:name="reference_6"/>[6] – <text:a xlink:type="simple" xlink:href="https://copr.fedorainfracloud.org/coprs/ycollet/audinux" office:target-frame-name="_blank" xlink:show="new" text:style-name="Internet_20_link" text:visited-style-name="Visited_20_Internet_20_Link">https://copr.fedorainfracloud.org/coprs/ycollet/audinux</text:a></text:p>
        <text:p text:style-name="P3"><text:bookmark text:name="reference_7"/>[7] – <text:a xlink:type="simple" xlink:href="https://www.reaper.fm/index.php" office:target-frame-name="_blank" xlink:show="new" text:style-name="Internet_20_link" text:visited-style-name="Visited_20_Internet_20_Link">https://www.reaper.fm/index.php</text:a></text:p>
        <text:p text:style-name="P3"><text:bookmark text:name="reference_8"/>[8] – <text:a xlink:type="simple" xlink:href="https://github.com/falkTX/Carla" text:style-name="Internet_20_link" text:visited-style-name="Visited_20_Internet_20_Link">https://github.co</text:a><text:a xlink:type="simple" xlink:href="https://github.com/falkTX/Carla" office:target-frame-name="_blank" xlink:show="new" text:style-name="Internet_20_link" text:visited-style-name="Visited_20_Internet_20_Link">m</text:a><text:a xlink:type="simple" xlink:href="https://github.com/falkTX/Carla" text:style-name="Internet_20_link" text:visited-style-name="Visited_20_Internet_20_Link">/falkTX/Carla</text:a></text:p>
        <text:p text:style-name="P3"><text:bookmark text:name="reference_9"/>[9] – <text:a xlink:type="simple" xlink:href="https://ardour.org/" office:target-frame-name="_blank" xlink:show="new" text:style-name="Internet_20_link" text:visited-style-name="Visited_20_Internet_20_Link">https://ardour.org</text:a></text:p>
        <text:p text:style-name="P3"><text:bookmark text:name="reference_10"/>[10] – <text:a xlink:type="simple" xlink:href="https://en.wikipedia.org/wiki/Envelope_(music)" office:target-frame-name="_blank" xlink:show="new" text:style-name="Internet_20_link" text:visited-style-name="Visited_20_Internet_20_Link">https://en.wikipedia.org/wiki/Envelope_(music)</text:a></text:p>
        <text:p text:style-name="P3"><text:bookmark text:name="reference_11"/>[11] – <text:a xlink:type="simple" xlink:href="https://jackaudio.org/" office:target-frame-name="_blank" xlink:show="new" text:style-name="Internet_20_link" text:visited-style-name="Visited_20_Internet_20_Link">https://jackaudio.org</text:a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ter" svg:font-family="Inter"/>
    <style:font-face style:name="Inter1" svg:font-family="Inter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Inter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Inter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nter1" style:font-family-complex="Inte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nter" style:font-family-complex="Inter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Inter" style:font-family-complex="Inte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nter" style:font-family-complex="Inter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Inter1" style:font-family-complex="Inter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Inter1" style:font-family-complex="Inter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Inter1" style:font-family-complex="Inter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Inter1" style:font-family-complex="Inter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22:29:09.565784472</meta:creation-date>
    <dc:date>2026-05-06T22:36:22.326555973</dc:date>
    <meta:editing-duration>PT7M13S</meta:editing-duration>
    <meta:editing-cycles>1</meta:editing-cycles>
    <meta:document-statistic meta:table-count="0" meta:image-count="9" meta:object-count="0" meta:page-count="13" meta:paragraph-count="379" meta:word-count="2385" meta:character-count="14844" meta:non-whitespace-character-count="12689"/>
    <meta:generator>LibreOffice/25.8.6.2$Linux_X86_64 LibreOffice_project/580$Build-2</meta:generator>
  </office:meta>
</office:document-meta>
</file>